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png" manifest:media-type="image/png"/>
  <manifest:file-entry manifest:full-path="media/image16.gif" manifest:media-type="image/gif"/>
  <manifest:file-entry manifest:full-path="media/image17.gif" manifest:media-type="image/gif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dia/image20.svg" manifest:media-type=""/>
  <manifest:file-entry manifest:full-path="media/image21.png" manifest:media-type="image/png"/>
  <manifest:file-entry manifest:full-path="media/image22.png" manifest:media-type="image/png"/>
  <manifest:file-entry manifest:full-path="media/image23.svg" manifest:media-type=""/>
  <manifest:file-entry manifest:full-path="media/image24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06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6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6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7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8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9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9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4">
      <style:drawing-page-properties draw:fill="solid" draw:fill-color="#16274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bitmap" draw:fill-image-name="a1107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1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2b49" style:text-line-through-type="none" style:text-line-through-style="none" style:text-line-through-width="auto" style:text-line-through-color="font-color" style:text-position="30% 66.6667%" fo:font-family="Lucida Sans Unicode" style:font-family-complex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01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219" style:parent-style-name="Graphics">
      <style:graphic-properties draw:fill="none" draw:stroke="non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704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707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80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80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90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0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bitmap" draw:fill-image-name="a1121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713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910">
      <style:drawing-page-properties draw:fill="solid" draw:fill-color="#16274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 style:parent-style-name="Graphics">
      <style:graphic-properties draw:fill="none" draw:stroke="non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bitmap" draw:fill-image-name="a1129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1">
      <style:drawing-page-properties draw:fill="solid" draw:fill-color="#16274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4">
      <style:graphic-properties fo:wrap-option="wrap" fo:padding-top="0.05in" fo:padding-bottom="0.05in" fo:padding-left="0.1in" fo:padding-right="0.1in" draw:textarea-vertical-align="top" draw:textarea-horizontal-align="left" draw:fill="bitmap" draw:fill-image-name="a1913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 style:parent-style-name="Graphics">
      <style:graphic-properties draw:fill="none" draw:stroke="none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left" draw:fill="bitmap" draw:fill-image-name="a1134" style:repeat="stretch" draw:stroke="none" draw:auto-grow-width="false" draw:auto-grow-height="false"/>
      <style:paragraph-properties style:font-independent-line-spacing="true" style:writing-mode="lr-tb"/>
    </style:style>
    <style:style style:family="presentation" style:name="a19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62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4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825" style:parent-style-name="Graphics">
      <style:graphic-properties draw:fill="none" fo:clip="rect(0in, 0in, 0in, 0in)" draw:stroke="none"/>
    </style:style>
    <style:style style:family="text" style:name="a143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 style:parent-style-name="Graphics">
      <style:graphic-properties draw:fill="none" draw:stroke="non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0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4">
      <style:graphic-properties fo:wrap-option="wrap" fo:padding-top="0.05in" fo:padding-bottom="0.05in" fo:padding-left="0.1in" fo:padding-right="0.1in" draw:textarea-vertical-align="top" draw:textarea-horizontal-align="left" draw:fill="bitmap" draw:fill-image-name="a1923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6" style:parent-style-name="Graphics">
      <style:graphic-properties draw:fill="none" draw:stroke="none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left" draw:fill="bitmap" draw:fill-image-name="a1144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19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3" style:parent-style-name="Graphics">
      <style:graphic-properties draw:fill="none" draw:stroke="none"/>
    </style:style>
    <style:style style:family="text" style:name="a163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44" style:parent-style-name="Graphics">
      <style:graphic-properties draw:fill="none" draw:stroke="none"/>
    </style:style>
    <style:style style:family="text" style:name="a163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3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3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734" style:parent-style-name="Graphics">
      <style:graphic-properties draw:fill="none" draw:stroke="non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5" style:parent-style-name="Graphics">
      <style:graphic-properties draw:fill="none" draw:stroke="none"/>
    </style:style>
    <style:style style:family="paragraph" style:name="a1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39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3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2">
      <style:graphic-properties fo:wrap-option="wrap" fo:padding-top="0.05in" fo:padding-bottom="0.05in" fo:padding-left="0.1in" fo:padding-right="0.1in" draw:textarea-vertical-align="top" draw:textarea-horizontal-align="left" draw:fill="bitmap" draw:fill-image-name="a1931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4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bitmap" draw:fill-image-name="a1152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936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Calibri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4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74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74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6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5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2b49" style:text-line-through-type="none" style:text-line-through-style="none" style:text-line-through-width="auto" style:text-line-through-color="font-color" style:text-position="30% 66.6667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5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2b49" style:text-line-through-type="none" style:text-line-through-style="none" style:text-line-through-width="auto" style:text-line-through-color="font-color" style:text-position="30% 66.6667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Wingdings" style:font-family-complex="Lucida Sans Unicode" style:font-pitch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solid" draw:fill-color="#d7e4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5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6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 style:parent-style-name="Graphics">
      <style:graphic-properties draw:fill="none" fo:clip="rect(0in, 0in, 0in, 0in)" draw:stroke="none"/>
    </style:style>
    <style:style style:family="text" style:name="a156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7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66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6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5">
      <style:drawing-page-properties draw:fill="solid" draw:fill-color="#16274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9">
      <style:graphic-properties fo:wrap-option="wrap" fo:padding-top="0.05in" fo:padding-bottom="0.05in" fo:padding-left="0.1in" fo:padding-right="0.1in" draw:textarea-vertical-align="top" draw:textarea-horizontal-align="left" draw:fill="bitmap" draw:fill-image-name="a1668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278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76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76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862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5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06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961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72" style:parent-style-name="Graphics">
      <style:graphic-properties draw:fill="none" draw:stroke="none"/>
    </style:style>
    <style:style style:family="text" style:name="a157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2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5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wrap" fo:padding-top="0.05in" fo:padding-bottom="0.05in" fo:padding-left="0.1in" fo:padding-right="0.1in" draw:textarea-vertical-align="top" draw:textarea-horizontal-align="left" draw:fill="bitmap" draw:fill-image-name="a1678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77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1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2">
      <style:graphic-properties style:vertical-pos="middle"/>
    </style:style>
    <style:style style:family="text" style:name="a1484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4">
      <style:graphic-properties style:vertical-pos="middle"/>
    </style:style>
    <style:style style:family="graphic" style:name="a1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1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 style:parent-style-name="Graphics">
      <style:graphic-properties draw:fill="none" draw:stroke="none"/>
    </style:style>
    <style:style style:family="text" style:name="a1970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7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 style:parent-style-name="Graphics">
      <style:graphic-properties draw:fill="none" draw:stroke="none"/>
    </style:style>
    <style:style style:family="text" style:name="a119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8" style:parent-style-name="Graphics">
      <style:graphic-properties draw:fill="none" draw:stroke="none"/>
    </style:style>
    <style:style style:family="paragraph" style:name="a1198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7">
      <style:graphic-properties fo:wrap-option="wrap" fo:padding-top="0.05in" fo:padding-bottom="0.05in" fo:padding-left="0.1in" fo:padding-right="0.1in" draw:textarea-vertical-align="top" draw:textarea-horizontal-align="left" draw:fill="bitmap" draw:fill-image-name="a1686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1780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1c334e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4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c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4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 style:parent-style-name="Graphics">
      <style:graphic-properties draw:fill="none" draw:stroke="none"/>
    </style:style>
    <style:style style:family="text" style:name="a202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2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8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4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6" style:parent-style-name="Graphics">
      <style:graphic-properties draw:fill="none" fo:clip="rect(0in, 0.3902in, 0in, 0.1463in)" draw:stroke="none"/>
    </style:style>
    <style:style style:family="text" style:name="a2125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8">
      <style:text-properties fo:font-variant="normal" fo:text-transform="none" fo:color="#002b49" style:text-line-through-type="none" style:text-line-through-style="none" style:text-line-through-width="auto" style:text-line-through-color="font-color" style:text-position="30% 66.6667%" fo:font-family="Lucida Sans Unicode" style:font-family-complex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8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8" style:parent-style-name="Graphics">
      <style:graphic-properties draw:fill="none" draw:stroke="none"/>
    </style:style>
    <style:style style:family="paragraph" style:name="a1691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29" style:parent-style-name="Graphics">
      <style:graphic-properties draw:fill="none" draw:stroke="none"/>
    </style:style>
    <style:style style:family="text" style:name="a1693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93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9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9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3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9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45" style:parent-style-name="Graphics">
      <style:graphic-properties draw:fill="none" draw:stroke="none"/>
    </style:style>
    <style:style style:family="drawing-page" style:name="a2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49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4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4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51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5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56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175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97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0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944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1473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947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1699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216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190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1193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1196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179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99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20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07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39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6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98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6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8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6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950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176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953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176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3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956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1959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201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02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189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05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1708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1642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14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08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7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02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199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48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208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84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5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199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08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1589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80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80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962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202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80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0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4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02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11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18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14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215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87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51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215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90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17">
      <text:list-level-style-number text:level="1" style:num-format="1" style:num-suffix="." style:num-list-format-name="">
        <style:list-level-properties text:space-before="0in" text:min-label-width="0.8125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family="Calibri" fo:font-size="100%"/>
      </text:list-level-style-number>
    </text:list-style>
    <text:list-style style:name="a1467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8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09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15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90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84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84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0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84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06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8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06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81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5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8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03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9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0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104" draw:master-page-name="Master1-Layout1-title-Title-Slide" presentation:presentation-page-layout-name="Master1-PPL1" draw:id="Slide-256">
        <draw:custom-shape svg:x="-2.9801in" svg:y="0in" svg:width="13.30108in" svg:height="7.5in" draw:id="id103" draw:style-name="a1108" draw:name="Freeform 3">
          <svg:title/>
          <svg:desc/>
          <text:p text:style-name="a1106" text:class-names="" text:cond-style-name=""><text:span text:style-name="a1105" text:class-names=""/></text:p>
          <draw:enhanced-geometry xmlns:dr3d="urn:oasis:names:tc:opendocument:xmlns:dr3d:1.0" draw:type="non-primitive" svg:viewBox="0 0 16148304 9144000" draw:enhanced-path="M 0 0 L 16148304 0 16148304 9144000 0 9144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148304"/>
            <draw:equation draw:name="f7" draw:formula="?f4 / 9144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04" presentation:style-name="a1111" draw:name="Title 1" svg:x="1.66667in" svg:y="1.50381in" svg:width="10in" svg:height="0.99983in" presentation:class="title" presentation:placeholder="false">
          <draw:text-box>
            <text:p text:style-name="a1110" text:class-names="" text:cond-style-name=""><text:span text:style-name="a1109" text:class-names="">HPC projects presentation</text:span></text:p>
          </draw:text-box>
          <svg:title/>
          <svg:desc/>
        </draw:frame>
        <draw:frame draw:id="id105" presentation:style-name="a1118" draw:name="Subtitle 2" svg:x="8.76352in" svg:y="4.99636in" svg:width="4.8547in" svg:height="1.81076in" presentation:class="subtitle" presentation:placeholder="false">
          <draw:text-box>
            <text:p text:style-name="a1113" text:class-names="" text:cond-style-name=""><text:span text:style-name="a1112" text:class-names="">Luca Lo Brutto <text:s text:c="7"/>s346285</text:span></text:p>
            <text:p text:style-name="a1115" text:class-names="" text:cond-style-name=""><text:span text:style-name="a1114" text:class-names="">Fabio Garrone <text:s text:c="7"/>s349449</text:span></text:p>
            <text:p text:style-name="a1117" text:class-names="" text:cond-style-name=""><text:span text:style-name="a1116" text:class-names="">Andrea Ruggiero <text:s text:c="3"/>s341930</text:span></text:p>
          </draw:text-box>
          <svg:title/>
          <svg:desc/>
        </draw:frame>
        <draw:g draw:name="Group 4" draw:id="id106">
          <svg:title/>
          <svg:desc/>
          <draw:custom-shape svg:x="0.67667in" svg:y="5.91667in" svg:width="2.37in" svg:height="1.04167in" draw:id="id109" draw:style-name="a1130" draw:name="Freeform 5">
            <svg:title/>
            <svg:desc/>
            <text:p text:style-name="a1128" text:class-names="" text:cond-style-name=""><text:span text:style-name="a1127" text:class-names=""/></text:p>
            <draw:enhanced-geometry xmlns:dr3d="urn:oasis:names:tc:opendocument:xmlns:dr3d:1.0" draw:type="non-primitive" svg:viewBox="0 0 2889504 1270000" draw:enhanced-path="M 0 0 L 2889504 0 2889504 1270000 0 1270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89504"/>
              <draw:equation draw:name="f7" draw:formula="?f4 / 1270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custom-shape svg:x="9.21903in" svg:y="4.80709in" svg:width="1.69764in" svg:height="0.045in" draw:id="id107" draw:style-name="a1122" draw:name="Freeform 6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type="non-primitive" svg:viewBox="0 0 1552318 41148" draw:enhanced-path="M 0 0 L 1552318 0 1552318 41148 0 41148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52318"/>
            <draw:equation draw:name="f7" draw:formula="?f4 / 4114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08" presentation:style-name="a1126" draw:name="Slide Number Placeholder 18" svg:x="9.41667in" svg:y="6.95139in" svg:width="3in" svg:height="0.39931in" presentation:class="page-number" presentation:placeholder="false">
          <draw:text-box>
            <text:p text:style-name="a1125" text:class-names="" text:cond-style-name=""><text:span text:style-name="a1123" text:class-names=""><text:page-number style:num-format="1" text:fixed="false"/></text:span><text:span text:style-name="a1124" text:class-names=""/></text:p>
          </draw:text-box>
          <svg:title/>
          <svg:desc/>
        </draw:frame>
      </draw:page>
      <draw:page draw:name="Slide43" draw:style-name="a1131" draw:master-page-name="Master1-Layout1-title-Title-Slide" presentation:presentation-page-layout-name="Master1-PPL1" draw:id="Slide-298">
        <draw:custom-shape svg:x="-2.9801in" svg:y="0in" svg:width="13.30108in" svg:height="7.5in" draw:id="id110" draw:style-name="a1135" draw:name="Freeform 3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16148304 9144000" draw:enhanced-path="M 0 0 L 16148304 0 16148304 9144000 0 9144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148304"/>
            <draw:equation draw:name="f7" draw:formula="?f4 / 9144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11" presentation:style-name="a1138" draw:name="Title 1" svg:x="4.87755in" svg:y="2.9705in" svg:width="4.0102in" svg:height="0.99983in" presentation:class="title" presentation:placeholder="false">
          <draw:text-box>
            <text:p text:style-name="a1137" text:class-names="" text:cond-style-name=""><text:span text:style-name="a1136" text:class-names="">MPI</text:span></text:p>
          </draw:text-box>
          <svg:title/>
          <svg:desc/>
        </draw:frame>
        <draw:frame draw:id="id112" presentation:style-name="a1141" draw:name="Subtitle 2" svg:x="4.43432in" svg:y="4.35042in" svg:width="4.8547in" svg:height="0.59548in" presentation:class="subtitle" presentation:placeholder="false">
          <draw:text-box>
            <text:p text:style-name="a1140" text:class-names="" text:cond-style-name=""><text:span text:style-name="a1139" text:class-names="">Andrea Ruggiero <text:s text:c="3"/>s341930</text:span></text:p>
          </draw:text-box>
          <svg:title/>
          <svg:desc/>
        </draw:frame>
        <draw:g draw:name="Group 4" draw:id="id113">
          <svg:title/>
          <svg:desc/>
          <draw:custom-shape svg:x="0.67667in" svg:y="5.91667in" svg:width="2.37in" svg:height="1.04167in" draw:id="id116" draw:style-name="a1153" draw:name="Freeform 5">
            <svg:title/>
            <svg:desc/>
            <text:p text:style-name="a1151" text:class-names="" text:cond-style-name=""><text:span text:style-name="a1150" text:class-names=""/></text:p>
            <draw:enhanced-geometry xmlns:dr3d="urn:oasis:names:tc:opendocument:xmlns:dr3d:1.0" draw:type="non-primitive" svg:viewBox="0 0 2889504 1270000" draw:enhanced-path="M 0 0 L 2889504 0 2889504 1270000 0 1270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89504"/>
              <draw:equation draw:name="f7" draw:formula="?f4 / 1270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custom-shape svg:x="4.87755in" svg:y="4.13537in" svg:width="4.0102in" svg:height="0.05in" draw:id="id114" draw:style-name="a1145" draw:name="Freeform 6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type="non-primitive" svg:viewBox="0 0 1552318 41148" draw:enhanced-path="M 0 0 L 1552318 0 1552318 41148 0 41148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52318"/>
            <draw:equation draw:name="f7" draw:formula="?f4 / 4114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15" presentation:style-name="a1149" draw:name="Slide Number Placeholder 18" svg:x="9.41667in" svg:y="6.95139in" svg:width="3in" svg:height="0.39931in" presentation:class="page-number" presentation:placeholder="false">
          <draw:text-box>
            <text:p text:style-name="a1148" text:class-names="" text:cond-style-name=""><text:span text:style-name="a1146" text:class-names=""><text:page-number style:num-format="1" text:fixed="false"/></text:span><text:span text:style-name="a1147" text:class-names=""/></text:p>
          </draw:text-box>
          <svg:title/>
          <svg:desc/>
        </draw:frame>
      </draw:page>
      <draw:page draw:name="Slide20" draw:style-name="a1154" draw:master-page-name="Master2-Layout2-obj-Title-and-Content" presentation:presentation-page-layout-name="Master2-PPL2" draw:id="Slide-275">
        <draw:frame draw:id="id117" presentation:style-name="a1158" draw:name="Title 5" svg:x="0.36871in" svg:y="0.14907in" svg:width="12.59591in" svg:height="0.80781in" presentation:class="title" presentation:placeholder="false">
          <draw:text-box>
            <text:p text:style-name="a1157" text:class-names="" text:cond-style-name=""><text:span text:style-name="a1155" text:class-names="">General Overview</text:span><text:span text:style-name="a1156" text:class-names=""/></text:p>
          </draw:text-box>
          <svg:title/>
          <svg:desc/>
        </draw:frame>
        <draw:frame draw:id="id118" draw:style-name="a1174" draw:name="Content Placeholder 2" svg:x="0.37244in" svg:y="2.20083in" svg:width="12.82527in" svg:height="3.23125in">
          <draw:text-box>
            <text:list text:style-name="a1161">
              <text:list-item>
                <text:p text:style-name="a1160" text:class-names="" text:cond-style-name=""><text:span text:style-name="a1159" text:class-names="">MPI: Systolic array structures for matrix multiplication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CUDA: Fundamentals of multi-dimensional data processing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OpenMP: Heat Diffusion Simulation in 2D Grid</text:span></text:p>
              </text:list-item>
            </text:list>
          </draw:text-box>
          <svg:title/>
          <svg:desc/>
        </draw:frame>
        <draw:frame draw:id="id119" presentation:style-name="a1178" draw:name="Slide Number Placeholder 9" svg:x="12.94979in" svg:y="6.98961in" svg:width="0.24792in" svg:height="0.28333in" presentation:class="page-number" presentation:placeholder="false">
          <draw:text-box>
            <text:p text:style-name="a1177" text:class-names="" text:cond-style-name=""><text:span text:style-name="a1175" text:class-names=""><text:page-number style:num-format="1" text:fixed="false"/></text:span><text:span text:style-name="a1176" text:class-names=""/></text:p>
          </draw:text-box>
          <svg:title/>
          <svg:desc/>
        </draw:frame>
      </draw:page>
      <draw:page draw:name="Slide22" draw:style-name="a1179" draw:master-page-name="Master2-Layout2-obj-Title-and-Content" presentation:presentation-page-layout-name="Master2-PPL2" draw:id="Slide-277">
        <draw:frame draw:id="id120" presentation:style-name="a1183" draw:name="Slide Number Placeholder 9" svg:x="12.94979in" svg:y="6.98961in" svg:width="0.24792in" svg:height="0.28333in" presentation:class="page-number" presentation:placeholder="false">
          <draw:text-box>
            <text:p text:style-name="a1182" text:class-names="" text:cond-style-name=""><text:span text:style-name="a1180" text:class-names=""><text:page-number style:num-format="1" text:fixed="false"/></text:span><text:span text:style-name="a1181" text:class-names=""/></text:p>
          </draw:text-box>
          <svg:title/>
          <svg:desc/>
        </draw:frame>
        <draw:frame draw:id="id121" draw:style-name="a1187" draw:name="Title 1" svg:x="0.50806in" svg:y="0.15199in" svg:width="11.5in" svg:height="0.80781in">
          <draw:text-box>
            <text:p text:style-name="a1186" text:class-names="" text:cond-style-name=""><text:span text:style-name="a1184" text:class-names="">Exercise</text:span><text:span text:style-name="a1185" text:class-names=""><text:s text:c="1"/>Overview: MPI</text:span></text:p>
          </draw:text-box>
          <svg:title/>
          <svg:desc/>
        </draw:frame>
        <draw:frame draw:id="id122" draw:style-name="a1209" draw:name="Content Placeholder 2" svg:x="0.50806in" svg:y="1.5212in" svg:width="11.5in" svg:height="4.24102in">
          <draw:text-box>
            <text:list text:style-name="a1190">
              <text:list-item>
                <text:p text:style-name="a1189" text:class-names="" text:cond-style-name=""><text:span text:style-name="a1188" text:class-names="">Introduction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Solution Description<text:s text:c="1"/>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/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Experimental Results<text:s text:c="1"/>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Conclusions</text:span></text:p>
              </text:list-item>
            </text:list>
          </draw:text-box>
          <svg:title/>
          <svg:desc/>
        </draw:frame>
      </draw:page>
      <draw:page draw:name="Slide21" draw:style-name="a1210" draw:master-page-name="Master2-Layout2-obj-Title-and-Content" presentation:presentation-page-layout-name="Master2-PPL2" draw:id="Slide-276">
        <draw:frame draw:id="id123" presentation:style-name="a1214" draw:name="Slide Number Placeholder 9" svg:x="12.94979in" svg:y="6.98961in" svg:width="0.24792in" svg:height="0.28333in" presentation:class="page-number" presentation:placeholder="false">
          <draw:text-box>
            <text:p text:style-name="a1213" text:class-names="" text:cond-style-name=""><text:span text:style-name="a1211" text:class-names=""><text:page-number style:num-format="1" text:fixed="false"/></text:span><text:span text:style-name="a1212" text:class-names=""/></text:p>
          </draw:text-box>
          <svg:title/>
          <svg:desc/>
        </draw:frame>
        <draw:frame draw:id="id124" draw:style-name="a1218" draw:name="Title 1" svg:x="0.50806in" svg:y="0.15199in" svg:width="11.5in" svg:height="0.80781in">
          <draw:text-box>
            <text:p text:style-name="a1217" text:class-names="" text:cond-style-name=""><text:span text:style-name="a1215" text:class-names="">Introduction</text:span><text:span text:style-name="a1216" text:class-names=""/></text:p>
          </draw:text-box>
          <svg:title/>
          <svg:desc/>
        </draw:frame>
        <draw:frame draw:id="id125" draw:style-name="a1219" draw:name="Picture 2" svg:x="5.77549in" svg:y="0.14858in" svg:width="7.17708in" svg:height="6.47917in" style:rel-width="scale" style:rel-height="scale">
          <draw:image xlink:href="media/image1.png" xlink:type="simple" xlink:show="embed" xlink:actuate="onLoad"/>
          <svg:title/>
          <svg:desc/>
        </draw:frame>
        <draw:frame draw:id="id126" draw:style-name="a1233" draw:name="Content Placeholder 2" svg:x="0.50806in" svg:y="1.5212in" svg:width="5.19478in" svg:height="4.37565in">
          <draw:text-box>
            <text:p text:style-name="a1223" text:class-names="" text:cond-style-name=""><text:span text:style-name="a1220" text:class-names="">The MPI exercise is based on<text:s text:c="1"/></text:span><text:span text:style-name="a1221" text:class-names="">Systolic array.</text:span><text:span text:style-name="a1222" text:class-names=""/></text:p>
            <text:p text:style-name="a1225" text:class-names="" text:cond-style-name=""><text:span text:style-name="a1224" text:class-names=""/></text:p>
            <text:p text:style-name="a1227" text:class-names="" text:cond-style-name=""><text:span text:style-name="a1226" text:class-names=""/></text:p>
            <text:p text:style-name="a1229" text:class-names="" text:cond-style-name=""><text:span text:style-name="a1228" text:class-names=""/></text:p>
            <text:p text:style-name="a1232" text:class-names="" text:cond-style-name=""><text:span text:style-name="a1230" text:class-names="">Each Processing Element (PE) is a process that receives and passes sub-matrices to and from neighbors using MPI communication.</text:span><text:span text:style-name="a1231" text:class-names=""/></text:p>
          </draw:text-box>
          <svg:title/>
          <svg:desc/>
        </draw:frame>
      </draw:page>
      <draw:page draw:name="Slide23" draw:style-name="a1234" draw:master-page-name="Master2-Layout2-obj-Title-and-Content" presentation:presentation-page-layout-name="Master2-PPL2" draw:id="Slide-278">
        <draw:frame draw:id="id127" presentation:style-name="a1238" draw:name="Slide Number Placeholder 9" svg:x="12.94979in" svg:y="6.98961in" svg:width="0.24792in" svg:height="0.28333in" presentation:class="page-number" presentation:placeholder="false">
          <draw:text-box>
            <text:p text:style-name="a1237" text:class-names="" text:cond-style-name=""><text:span text:style-name="a1235" text:class-names=""><text:page-number style:num-format="1" text:fixed="false"/></text:span><text:span text:style-name="a1236" text:class-names=""/></text:p>
          </draw:text-box>
          <svg:title/>
          <svg:desc/>
        </draw:frame>
        <draw:frame draw:id="id128" draw:style-name="a1242" draw:name="Title 1" svg:x="0.50806in" svg:y="0.15199in" svg:width="11.5in" svg:height="0.80781in">
          <draw:text-box>
            <text:p text:style-name="a1241" text:class-names="" text:cond-style-name=""><text:span text:style-name="a1239" text:class-names="">Solution Description</text:span><text:span text:style-name="a1240" text:class-names=""/></text:p>
          </draw:text-box>
          <svg:title/>
          <svg:desc/>
        </draw:frame>
        <draw:frame draw:id="id129" draw:style-name="a1243" draw:name="Picture 4" svg:x="6.66586in" svg:y="0.93897in" svg:width="6.67662in" svg:height="5.62207in" style:rel-width="scale" style:rel-height="scale">
          <draw:image xlink:href="media/image2.png" xlink:type="simple" xlink:show="embed" xlink:actuate="onLoad"/>
          <svg:title/>
          <svg:desc/>
        </draw:frame>
        <draw:frame draw:id="id130" draw:style-name="a1244" draw:name="Picture 2" svg:x="1.03646in" svg:y="2.78069in" svg:width="4.59375in" svg:height="1.13542in" style:rel-width="scale" style:rel-height="scale">
          <draw:image xlink:href="media/image3.png" xlink:type="simple" xlink:show="embed" xlink:actuate="onLoad"/>
          <svg:title/>
          <svg:desc/>
        </draw:frame>
        <draw:frame draw:id="id132" draw:style-name="a1248" draw:name="Content Placeholder 2" svg:x="0.4259in" svg:y="1.08692in" svg:width="7.3544in" svg:height="0.60586in">
          <draw:text-box>
            <text:p text:style-name="a1247" text:class-names="" text:cond-style-name="" text:id="id131"><text:span text:style-name="a1245" text:class-names="">Multi-threading</text:span><text:span text:style-name="a1246" text:class-names=""/></text:p>
          </draw:text-box>
          <svg:title/>
          <svg:desc/>
        </draw:frame>
        <draw:frame draw:id="id135" draw:style-name="a1257" draw:name="Content Placeholder 2" svg:x="0.50266in" svg:y="1.90929in" svg:width="7.3544in" svg:height="0.87513in">
          <draw:text-box>
            <text:p text:style-name="a1252" text:class-names="" text:cond-style-name="" text:id="id133"><text:span text:style-name="a1249" text:class-names="">After<text:s text:c="1"/></text:span><text:span text:style-name="a1250" text:class-names="">submatix</text:span><text:span text:style-name="a1251" text:class-names=""> scattering the node</text:span></text:p>
            <text:p text:style-name="a1256" text:class-names="" text:cond-style-name="" text:id="id134"><text:span text:style-name="a1253" text:class-names="">compute the k-</text:span><text:span text:style-name="a1254" text:class-names="">th</text:span><text:span text:style-name="a1255" text:class-names=""> partial result:</text:span></text:p>
          </draw:text-box>
          <svg:title/>
          <svg:desc/>
        </draw:frame>
        <draw:frame draw:id="id136" draw:style-name="a1262" draw:name="Content Placeholder 2" svg:x="0.42234in" svg:y="4.9113in" svg:width="6.43071in" svg:height="0.87513in">
          <draw:text-box>
            <text:p text:style-name="a1261" text:class-names="" text:cond-style-name=""><text:span text:style-name="a1258" text:class-names="">Then the final result is<text:s text:c="1"/></text:span><text:span text:style-name="a1259" text:class-names="">reconstrut</text:span><text:span text:style-name="a1260" text:class-names=""><text:s text:c="1"/>as combination of partial computations</text:span></text:p>
          </draw:text-box>
          <svg:title/>
          <svg:desc/>
        </draw:frame>
      </draw:page>
      <draw:page draw:name="Slide49" draw:style-name="a1263" draw:master-page-name="Master2-Layout2-obj-Title-and-Content" presentation:presentation-page-layout-name="Master2-PPL2" draw:id="Slide-304">
        <draw:custom-shape svg:width="1.19835in" svg:height="2.26128in" draw:id="id137" draw:style-name="a1266" draw:transform="translate(-0.59917in -1.13064in) rotate(-4.71239) translate(11.14107in 4.63399in)" draw:name="Speech Bubble: Rectangle 94">
          <svg:title/>
          <svg:desc/>
          <text:p text:style-name="a1265" text:class-names="" text:cond-style-name=""><text:span text:style-name="a1264" text:class-names=""/></text:p>
          <draw:enhanced-geometry xmlns:dr3d="urn:oasis:names:tc:opendocument:xmlns:dr3d:1.0"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6300 24300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svg:width="1.56983in" svg:height="2.20104in" draw:id="id138" draw:style-name="a1269" draw:transform="translate(-0.78491in -1.10052in) rotate(-1.5708) translate(11.00051in 5.48238in)" draw:name="Speech Bubble: Rectangle 92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6300 24300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svg:width="1.04774in" svg:height="2.2914in" draw:id="id139" draw:style-name="a1272" draw:transform="translate(-0.52387in -1.1457in) rotate(-4.71239) translate(11.13605in 6.27556in)" draw:name="Speech Bubble: Rectangle 91">
          <svg:title/>
          <svg:desc/>
          <text:p text:style-name="a1271" text:class-names="" text:cond-style-name=""><text:span text:style-name="a1270" text:class-names=""/></text:p>
          <draw:enhanced-geometry xmlns:dr3d="urn:oasis:names:tc:opendocument:xmlns:dr3d:1.0"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6300 24300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svg:width="2.70437in" svg:height="2.27133in" draw:id="id140" draw:style-name="a1275" draw:transform="translate(-1.35218in -1.13566in) rotate(-1.5708) translate(11.0959in 2.14404in)" draw:name="Speech Bubble: Rectangle 88">
          <svg:title/>
          <svg:desc/>
          <text:p text:style-name="a1274" text:class-names="" text:cond-style-name=""><text:span text:style-name="a1273" text:class-names=""/></text:p>
          <draw:enhanced-geometry xmlns:dr3d="urn:oasis:names:tc:opendocument:xmlns:dr3d:1.0"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6300 24300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id="id141" presentation:style-name="a1279" draw:name="Slide Number Placeholder 9" svg:x="12.94979in" svg:y="6.98961in" svg:width="0.24792in" svg:height="0.28333in" presentation:class="page-number" presentation:placeholder="false">
          <draw:text-box>
            <text:p text:style-name="a1278" text:class-names="" text:cond-style-name=""><text:span text:style-name="a1276" text:class-names=""><text:page-number style:num-format="1" text:fixed="false"/></text:span><text:span text:style-name="a1277" text:class-names=""/></text:p>
          </draw:text-box>
          <svg:title/>
          <svg:desc/>
        </draw:frame>
        <draw:frame draw:id="id142" draw:style-name="a1283" draw:name="Title 1" svg:x="0.50806in" svg:y="0.15199in" svg:width="11.5in" svg:height="0.80781in">
          <draw:text-box>
            <text:p text:style-name="a1282" text:class-names="" text:cond-style-name=""><text:span text:style-name="a1280" text:class-names="">Solution Description</text:span><text:span text:style-name="a1281" text:class-names=""/></text:p>
          </draw:text-box>
          <svg:title/>
          <svg:desc/>
        </draw:frame>
        <draw:custom-shape svg:x="10.01347in" svg:y="4.20841in" svg:width="0.41812in" svg:height="0.49844in" draw:id="id143" draw:style-name="a1286" draw:name="Rectangle 38">
          <svg:title/>
          <svg:desc/>
          <text:p text:style-name="a1285" text:class-names="" text:cond-style-name=""><text:span text:style-name="a12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43516in" svg:y="4.20841in" svg:width="0.41812in" svg:height="0.49844in" draw:id="id144" draw:style-name="a1289" draw:name="Rectangle 39">
          <svg:title/>
          <svg:desc/>
          <text:p text:style-name="a1288" text:class-names="" text:cond-style-name=""><text:span text:style-name="a12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5685in" svg:y="4.20841in" svg:width="0.41812in" svg:height="0.49844in" draw:id="id145" draw:style-name="a1292" draw:name="Rectangle 40">
          <svg:title/>
          <svg:desc/>
          <text:p text:style-name="a1291" text:class-names="" text:cond-style-name=""><text:span text:style-name="a12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7853in" svg:y="4.20841in" svg:width="0.41812in" svg:height="0.49844in" draw:id="id146" draw:style-name="a1295" draw:name="Rectangle 41">
          <svg:title/>
          <svg:desc/>
          <text:p text:style-name="a1294" text:class-names="" text:cond-style-name=""><text:span text:style-name="a12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70022in" svg:y="4.20841in" svg:width="0.41812in" svg:height="0.49844in" draw:id="id147" draw:style-name="a1298" draw:name="Rectangle 42">
          <svg:title/>
          <svg:desc/>
          <text:p text:style-name="a1297" text:class-names="" text:cond-style-name=""><text:span text:style-name="a12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70022in" svg:y="5.21242in" svg:width="0.41812in" svg:height="0.49844in" draw:id="id148" draw:style-name="a1301" draw:name="Rectangle 43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5685in" svg:y="5.21242in" svg:width="0.41812in" svg:height="0.49844in" draw:id="id149" draw:style-name="a1304" draw:name="Rectangle 44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43516in" svg:y="5.21242in" svg:width="0.41812in" svg:height="0.49844in" draw:id="id150" draw:style-name="a1307" draw:name="Rectangle 45">
          <svg:title/>
          <svg:desc/>
          <text:p text:style-name="a1306" text:class-names="" text:cond-style-name=""><text:span text:style-name="a13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1347in" svg:y="4.71042in" svg:width="0.41812in" svg:height="0.49844in" draw:id="id151" draw:style-name="a1310" draw:name="Rectangle 46">
          <svg:title/>
          <svg:desc/>
          <text:p text:style-name="a1309" text:class-names="" text:cond-style-name=""><text:span text:style-name="a13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43516in" svg:y="4.71042in" svg:width="0.41812in" svg:height="0.49844in" draw:id="id152" draw:style-name="a1313" draw:name="Rectangle 47">
          <svg:title/>
          <svg:desc/>
          <text:p text:style-name="a1312" text:class-names="" text:cond-style-name=""><text:span text:style-name="a13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5685in" svg:y="4.71042in" svg:width="0.41812in" svg:height="0.49844in" draw:id="id153" draw:style-name="a1316" draw:name="Rectangle 48">
          <svg:title/>
          <svg:desc/>
          <text:p text:style-name="a1315" text:class-names="" text:cond-style-name=""><text:span text:style-name="a13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7853in" svg:y="4.71042in" svg:width="0.41812in" svg:height="0.49844in" draw:id="id154" draw:style-name="a1319" draw:name="Rectangle 49">
          <svg:title/>
          <svg:desc/>
          <text:p text:style-name="a1318" text:class-names="" text:cond-style-name=""><text:span text:style-name="a1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70022in" svg:y="4.71042in" svg:width="0.41812in" svg:height="0.49844in" draw:id="id155" draw:style-name="a1322" draw:name="Rectangle 50">
          <svg:title/>
          <svg:desc/>
          <text:p text:style-name="a1321" text:class-names="" text:cond-style-name=""><text:span text:style-name="a13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7853in" svg:y="5.21243in" svg:width="0.41812in" svg:height="0.49844in" draw:id="id156" draw:style-name="a1325" draw:name="Rectangle 51">
          <svg:title/>
          <svg:desc/>
          <text:p text:style-name="a1324" text:class-names="" text:cond-style-name=""><text:span text:style-name="a13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1347in" svg:y="5.21242in" svg:width="0.41812in" svg:height="0.49844in" draw:id="id157" draw:style-name="a1328" draw:name="Rectangle 52">
          <svg:title/>
          <svg:desc/>
          <text:p text:style-name="a1327" text:class-names="" text:cond-style-name=""><text:span text:style-name="a13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70022in" svg:y="5.71443in" svg:width="0.41812in" svg:height="0.49844in" draw:id="id158" draw:style-name="a1331" draw:name="Rectangle 53">
          <svg:title/>
          <svg:desc/>
          <text:p text:style-name="a1330" text:class-names="" text:cond-style-name=""><text:span text:style-name="a13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5685in" svg:y="5.71443in" svg:width="0.41812in" svg:height="0.49844in" draw:id="id159" draw:style-name="a1334" draw:name="Rectangle 54">
          <svg:title/>
          <svg:desc/>
          <text:p text:style-name="a1333" text:class-names="" text:cond-style-name=""><text:span text:style-name="a13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43516in" svg:y="5.71443in" svg:width="0.41812in" svg:height="0.49844in" draw:id="id160" draw:style-name="a1337" draw:name="Rectangle 55">
          <svg:title/>
          <svg:desc/>
          <text:p text:style-name="a1336" text:class-names="" text:cond-style-name=""><text:span text:style-name="a1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7853in" svg:y="5.71443in" svg:width="0.41812in" svg:height="0.49844in" draw:id="id161" draw:style-name="a1340" draw:name="Rectangle 56">
          <svg:title/>
          <svg:desc/>
          <text:p text:style-name="a1339" text:class-names="" text:cond-style-name=""><text:span text:style-name="a13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1347in" svg:y="5.71443in" svg:width="0.41812in" svg:height="0.49844in" draw:id="id162" draw:style-name="a1343" draw:name="Rectangle 57">
          <svg:title/>
          <svg:desc/>
          <text:p text:style-name="a1342" text:class-names="" text:cond-style-name=""><text:span text:style-name="a13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70022in" svg:y="6.21644in" svg:width="0.41812in" svg:height="0.49844in" draw:id="id163" draw:style-name="a1346" draw:name="Rectangle 58">
          <svg:title/>
          <svg:desc/>
          <text:p text:style-name="a1345" text:class-names="" text:cond-style-name=""><text:span text:style-name="a13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5685in" svg:y="6.21644in" svg:width="0.41812in" svg:height="0.49844in" draw:id="id164" draw:style-name="a1349" draw:name="Rectangle 59">
          <svg:title/>
          <svg:desc/>
          <text:p text:style-name="a1348" text:class-names="" text:cond-style-name=""><text:span text:style-name="a1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43516in" svg:y="6.21644in" svg:width="0.41812in" svg:height="0.49844in" draw:id="id165" draw:style-name="a1352" draw:name="Rectangle 60">
          <svg:title/>
          <svg:desc/>
          <text:p text:style-name="a1351" text:class-names="" text:cond-style-name=""><text:span text:style-name="a13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7853in" svg:y="6.21644in" svg:width="0.41812in" svg:height="0.49844in" draw:id="id166" draw:style-name="a1355" draw:name="Rectangle 61">
          <svg:title/>
          <svg:desc/>
          <text:p text:style-name="a1354" text:class-names="" text:cond-style-name=""><text:span text:style-name="a1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1347in" svg:y="6.21644in" svg:width="0.41812in" svg:height="0.49844in" draw:id="id167" draw:style-name="a1358" draw:name="Rectangle 62">
          <svg:title/>
          <svg:desc/>
          <text:p text:style-name="a1357" text:class-names="" text:cond-style-name=""><text:span text:style-name="a13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359in" svg:y="0.84496in" svg:width="0.41812in" svg:height="0.49844in" draw:id="id168" draw:style-name="a1361" draw:name="Rectangle 63">
          <svg:title/>
          <svg:desc/>
          <text:p text:style-name="a1360" text:class-names="" text:cond-style-name=""><text:span text:style-name="a13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46528in" svg:y="0.84496in" svg:width="0.41812in" svg:height="0.49844in" draw:id="id169" draw:style-name="a1364" draw:name="Rectangle 64">
          <svg:title/>
          <svg:desc/>
          <text:p text:style-name="a1363" text:class-names="" text:cond-style-name=""><text:span text:style-name="a1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8697in" svg:y="0.84496in" svg:width="0.41812in" svg:height="0.49844in" draw:id="id170" draw:style-name="a1367" draw:name="Rectangle 65">
          <svg:title/>
          <svg:desc/>
          <text:p text:style-name="a1366" text:class-names="" text:cond-style-name=""><text:span text:style-name="a1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30865in" svg:y="0.84496in" svg:width="0.41812in" svg:height="0.49844in" draw:id="id171" draw:style-name="a1370" draw:name="Rectangle 66">
          <svg:title/>
          <svg:desc/>
          <text:p text:style-name="a1369" text:class-names="" text:cond-style-name=""><text:span text:style-name="a1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73034in" svg:y="0.84496in" svg:width="0.41812in" svg:height="0.49844in" draw:id="id172" draw:style-name="a1373" draw:name="Rectangle 67">
          <svg:title/>
          <svg:desc/>
          <text:p text:style-name="a1372" text:class-names="" text:cond-style-name=""><text:span text:style-name="a1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73034in" svg:y="1.84897in" svg:width="0.41812in" svg:height="0.49844in" draw:id="id173" draw:style-name="a1376" draw:name="Rectangle 68">
          <svg:title/>
          <svg:desc/>
          <text:p text:style-name="a1375" text:class-names="" text:cond-style-name=""><text:span text:style-name="a1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8697in" svg:y="1.84897in" svg:width="0.41812in" svg:height="0.49844in" draw:id="id174" draw:style-name="a1379" draw:name="Rectangle 69">
          <svg:title/>
          <svg:desc/>
          <text:p text:style-name="a1378" text:class-names="" text:cond-style-name=""><text:span text:style-name="a1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46528in" svg:y="1.84897in" svg:width="0.41812in" svg:height="0.49844in" draw:id="id175" draw:style-name="a1382" draw:name="Rectangle 70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359in" svg:y="1.34696in" svg:width="0.41812in" svg:height="0.49844in" draw:id="id176" draw:style-name="a1385" draw:name="Rectangle 71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46528in" svg:y="1.34696in" svg:width="0.41812in" svg:height="0.49844in" draw:id="id177" draw:style-name="a1388" draw:name="Rectangle 72">
          <svg:title/>
          <svg:desc/>
          <text:p text:style-name="a1387" text:class-names="" text:cond-style-name=""><text:span text:style-name="a1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8697in" svg:y="1.34696in" svg:width="0.41812in" svg:height="0.49844in" draw:id="id178" draw:style-name="a1391" draw:name="Rectangle 73">
          <svg:title/>
          <svg:desc/>
          <text:p text:style-name="a1390" text:class-names="" text:cond-style-name=""><text:span text:style-name="a1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30865in" svg:y="1.34696in" svg:width="0.41812in" svg:height="0.49844in" draw:id="id179" draw:style-name="a1394" draw:name="Rectangle 74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73034in" svg:y="1.34696in" svg:width="0.41812in" svg:height="0.49844in" draw:id="id180" draw:style-name="a1397" draw:name="Rectangle 75">
          <svg:title/>
          <svg:desc/>
          <text:p text:style-name="a1396" text:class-names="" text:cond-style-name=""><text:span text:style-name="a1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30865in" svg:y="1.84897in" svg:width="0.41812in" svg:height="0.49844in" draw:id="id181" draw:style-name="a1400" draw:name="Rectangle 76">
          <svg:title/>
          <svg:desc/>
          <text:p text:style-name="a1399" text:class-names="" text:cond-style-name=""><text:span text:style-name="a1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359in" svg:y="1.84897in" svg:width="0.41812in" svg:height="0.49844in" draw:id="id182" draw:style-name="a1403" draw:name="Rectangle 77">
          <svg:title/>
          <svg:desc/>
          <text:p text:style-name="a1402" text:class-names="" text:cond-style-name=""><text:span text:style-name="a1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73034in" svg:y="2.35098in" svg:width="0.41812in" svg:height="0.49844in" draw:id="id183" draw:style-name="a1406" draw:name="Rectangle 78">
          <svg:title/>
          <svg:desc/>
          <text:p text:style-name="a1405" text:class-names="" text:cond-style-name=""><text:span text:style-name="a1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8697in" svg:y="2.35098in" svg:width="0.41812in" svg:height="0.49844in" draw:id="id184" draw:style-name="a1409" draw:name="Rectangle 79">
          <svg:title/>
          <svg:desc/>
          <text:p text:style-name="a1408" text:class-names="" text:cond-style-name=""><text:span text:style-name="a1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46528in" svg:y="2.35098in" svg:width="0.41812in" svg:height="0.49844in" draw:id="id185" draw:style-name="a1412" draw:name="Rectangle 80">
          <svg:title/>
          <svg:desc/>
          <text:p text:style-name="a1411" text:class-names="" text:cond-style-name=""><text:span text:style-name="a1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30865in" svg:y="2.35098in" svg:width="0.41812in" svg:height="0.49844in" draw:id="id186" draw:style-name="a1415" draw:name="Rectangle 81">
          <svg:title/>
          <svg:desc/>
          <text:p text:style-name="a1414" text:class-names="" text:cond-style-name=""><text:span text:style-name="a1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359in" svg:y="2.35098in" svg:width="0.41812in" svg:height="0.49844in" draw:id="id187" draw:style-name="a1418" draw:name="Rectangle 82">
          <svg:title/>
          <svg:desc/>
          <text:p text:style-name="a1417" text:class-names="" text:cond-style-name=""><text:span text:style-name="a1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73034in" svg:y="2.85299in" svg:width="0.41812in" svg:height="0.49844in" draw:id="id188" draw:style-name="a1421" draw:name="Rectangle 83">
          <svg:title/>
          <svg:desc/>
          <text:p text:style-name="a1420" text:class-names="" text:cond-style-name=""><text:span text:style-name="a1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8697in" svg:y="2.85299in" svg:width="0.41812in" svg:height="0.49844in" draw:id="id189" draw:style-name="a1424" draw:name="Rectangle 84">
          <svg:title/>
          <svg:desc/>
          <text:p text:style-name="a1423" text:class-names="" text:cond-style-name=""><text:span text:style-name="a1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46528in" svg:y="2.85298in" svg:width="0.41812in" svg:height="0.49844in" draw:id="id190" draw:style-name="a1427" draw:name="Rectangle 85">
          <svg:title/>
          <svg:desc/>
          <text:p text:style-name="a1426" text:class-names="" text:cond-style-name=""><text:span text:style-name="a1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30865in" svg:y="2.85299in" svg:width="0.41812in" svg:height="0.49844in" draw:id="id191" draw:style-name="a1430" draw:name="Rectangle 86">
          <svg:title/>
          <svg:desc/>
          <text:p text:style-name="a1429" text:class-names="" text:cond-style-name=""><text:span text:style-name="a1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359in" svg:y="2.85299in" svg:width="0.41812in" svg:height="0.49844in" draw:id="id192" draw:style-name="a1433" draw:name="Rectangle 87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draw:style-name="a1436" draw:name="Content Placeholder 2" svg:x="8.72092in" svg:y="0.32642in" svg:width="2.53414in" svg:height="0.43757in">
          <draw:text-box>
            <text:p text:style-name="a1435" text:class-names="" text:cond-style-name=""><text:span text:style-name="a1434" text:class-names="">Single thread</text:span></text:p>
          </draw:text-box>
          <svg:title/>
          <svg:desc/>
        </draw:frame>
        <draw:frame draw:id="id194" draw:style-name="a1439" draw:name="Content Placeholder 2" svg:x="8.83136in" svg:y="3.59951in" svg:width="3.34739in" svg:height="0.43757in">
          <draw:text-box>
            <text:p text:style-name="a1438" text:class-names="" text:cond-style-name=""><text:span text:style-name="a1437" text:class-names="">Multiple thread</text:span></text:p>
          </draw:text-box>
          <svg:title/>
          <svg:desc/>
        </draw:frame>
        <draw:frame draw:id="id196" draw:style-name="a1442" draw:name="Content Placeholder 2" svg:x="12.5663in" svg:y="6.05935in" svg:width="0.83735in" svg:height="0.43757in">
          <draw:text-box>
            <text:p text:style-name="a1441" text:class-names="" text:cond-style-name="" text:id="id195"><text:span text:style-name="a1440" text:class-names="">th0</text:span></text:p>
          </draw:text-box>
          <svg:title/>
          <svg:desc/>
        </draw:frame>
        <draw:frame draw:id="id197" draw:style-name="a1445" draw:name="Content Placeholder 2" svg:x="9.07232in" svg:y="4.70392in" svg:width="0.83735in" svg:height="0.43757in">
          <draw:text-box>
            <text:p text:style-name="a1444" text:class-names="" text:cond-style-name=""><text:span text:style-name="a1443" text:class-names="">th1</text:span></text:p>
          </draw:text-box>
          <svg:title/>
          <svg:desc/>
        </draw:frame>
        <draw:frame draw:id="id198" draw:style-name="a1448" draw:name="Content Placeholder 2" svg:x="12.56629in" svg:y="4.41276in" svg:width="0.83735in" svg:height="0.43757in">
          <draw:text-box>
            <text:p text:style-name="a1447" text:class-names="" text:cond-style-name=""><text:span text:style-name="a1446" text:class-names="">th2</text:span></text:p>
          </draw:text-box>
          <svg:title/>
          <svg:desc/>
        </draw:frame>
        <draw:frame draw:id="id206" draw:style-name="a1474" draw:name="Content Placeholder 2" svg:x="0.50623in" svg:y="1.09073in" svg:width="7.83177in" svg:height="4.81322in">
          <draw:text-box>
            <text:p text:style-name="a1455" text:class-names="" text:cond-style-name="" text:id="id199"><text:span text:style-name="a1449" text:class-names="">One of the main problem of<text:s text:c="1"/></text:span><text:span text:style-name="a1450" text:class-names="">multy</text:span><text:span text:style-name="a1451" text:class-names=""><text:s text:c="1"/>process and distributed system is Race<text:s text:c="1"/></text:span><text:span text:style-name="a1452" text:class-names="">condition</text:span><text:span text:style-name="a1453" text:class-names=""><text:s text:c="1"/>and Synchronization loss.</text:span><text:span text:style-name="a1454" text:class-names=""/></text:p>
            <text:p text:style-name="a1457" text:class-names="" text:cond-style-name="" text:id="id200"><text:span text:style-name="a1456" text:class-names=""/></text:p>
            <text:p text:style-name="a1459" text:class-names="" text:cond-style-name="" text:id="id201"><text:span text:style-name="a1458" text:class-names=""/></text:p>
            <text:p text:style-name="a1464" text:class-names="" text:cond-style-name="" text:id="id202"><text:span text:style-name="a1460" text:class-names="">This problem<text:s text:c="1"/></text:span><text:span text:style-name="a1461" text:class-names="">i</text:span><text:span text:style-name="a1462" text:class-names="">s solved assigning statically<text:s text:c="1"/></text:span><text:span text:style-name="a1463" text:class-names="">the memory blocks:</text:span></text:p>
            <text:list text:style-name="a1467">
              <text:list-item>
                <text:p text:style-name="a1466" text:class-names="" text:cond-style-name="" text:id="id203"><text:span text:style-name="a1465" text:class-names="">Root manage the input matrices</text:span></text:p>
              </text:list-item>
            </text:list>
            <text:list text:style-name="a1470">
              <text:list-item>
                <text:p text:style-name="a1469" text:class-names="" text:cond-style-name="" text:id="id204"><text:span text:style-name="a1468" text:class-names="">Node contain scattered submatrices</text:span></text:p>
              </text:list-item>
            </text:list>
            <text:list text:style-name="a1473">
              <text:list-item>
                <text:p text:style-name="a1472" text:class-names="" text:cond-style-name="" text:id="id205"><text:span text:style-name="a1471" text:class-names="">Thread manage their portion of output matrix</text:span></text:p>
              </text:list-item>
            </text:list>
          </draw:text-box>
          <svg:title/>
          <svg:desc/>
        </draw:frame>
        <draw:frame draw:id="id207" draw:style-name="a1477" draw:name="Content Placeholder 2" svg:x="9.07232in" svg:y="1.08947in" svg:width="0.83735in" svg:height="0.43757in">
          <draw:text-box>
            <text:p text:style-name="a1476" text:class-names="" text:cond-style-name=""><text:span text:style-name="a1475" text:class-names="">th0</text:span></text:p>
          </draw:text-box>
          <svg:title/>
          <svg:desc/>
        </draw:frame>
      </draw:page>
      <draw:page draw:name="Slide24" draw:style-name="a1478" draw:master-page-name="Master2-Layout2-obj-Title-and-Content" presentation:presentation-page-layout-name="Master2-PPL2" draw:id="Slide-279">
        <draw:frame draw:id="id208" presentation:style-name="a1482" draw:name="Slide Number Placeholder 9" svg:x="12.94979in" svg:y="6.98961in" svg:width="0.24792in" svg:height="0.28333in" presentation:class="page-number" presentation:placeholder="false">
          <draw:text-box>
            <text:p text:style-name="a1481" text:class-names="" text:cond-style-name=""><text:span text:style-name="a1479" text:class-names=""><text:page-number style:num-format="1" text:fixed="false"/></text:span><text:span text:style-name="a1480" text:class-names=""/></text:p>
          </draw:text-box>
          <svg:title/>
          <svg:desc/>
        </draw:frame>
        <draw:frame draw:id="id209" draw:style-name="a1486" draw:name="Title 1" svg:x="0.50806in" svg:y="0.15199in" svg:width="11.5in" svg:height="0.80781in">
          <draw:text-box>
            <text:p text:style-name="a1485" text:class-names="" text:cond-style-name=""><text:span text:style-name="a1483" text:class-names="">Experimental Results</text:span><text:span text:style-name="a1484" text:class-names=""/></text:p>
          </draw:text-box>
          <svg:title/>
          <svg:desc/>
        </draw:frame>
        <draw:frame draw:id="id210" draw:style-name="a1487" draw:name="Picture 3" svg:x="5.04216in" svg:y="1.85353in" svg:width="8.25704in" svg:height="4.94718in" style:rel-width="scale" style:rel-height="scale">
          <draw:image xlink:href="media/image4.jpeg" xlink:type="simple" xlink:show="embed" xlink:actuate="onLoad"/>
          <svg:title/>
          <svg:desc/>
        </draw:frame>
        <draw:custom-shape svg:width="2.33568in" svg:height="0.68075in" draw:id="id212" draw:style-name="a1490" draw:transform="translate(-1.16784in -0.34038in) rotate(-0.36652) translate(9.61682in 5.70542in)" draw:name="Oval 4">
          <svg:title/>
          <svg:desc/>
          <text:p text:style-name="a1489" text:class-names="" text:cond-style-name="" text:id="id211"><text:span text:style-name="a14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14" draw:style-name="a1493" draw:name="Content Placeholder 2" svg:x="0.50581in" svg:y="1.46364in" svg:width="7.3544in" svg:height="0.60586in">
          <draw:text-box>
            <text:p text:style-name="a1492" text:class-names="" text:cond-style-name="" text:id="id213"><text:span text:style-name="a1491" text:class-names="">Amdahl law</text:span></text:p>
          </draw:text-box>
          <svg:title/>
          <svg:desc/>
        </draw:frame>
        <draw:frame draw:id="id215" draw:style-name="a1511" draw:name="Content Placeholder 2" svg:x="0.20942in" svg:y="2.35786in" svg:width="5.08062in" svg:height="3.50052in">
          <draw:text-box>
            <text:p text:style-name="a1496" text:class-names="" text:cond-style-name=""><text:span text:style-name="a1494" text:class-names="">The computation result is aligned<text:s text:c="1"/></text:span><text:span text:style-name="a1495" text:class-names="">to experimental result</text:span></text:p>
            <text:p text:style-name="a1498" text:class-names="" text:cond-style-name=""><text:span text:style-name="a1497" text:class-names=""/></text:p>
            <text:p text:style-name="a1502" text:class-names="" text:cond-style-name=""><text:span text:style-name="a1499" text:class-names="">The<text:s text:c="1"/></text:span><text:span text:style-name="a1500" text:class-names="">tradeoff is ~ 7 thread</text:span><text:span text:style-name="a1501" text:class-names=""/></text:p>
            <text:p text:style-name="a1504" text:class-names="" text:cond-style-name=""><text:span text:style-name="a1503" text:class-names=""/></text:p>
            <text:p text:style-name="a1506" text:class-names="" text:cond-style-name=""><text:span text:style-name="a1505" text:class-names=""/></text:p>
            <text:p text:style-name="a1510" text:class-names="" text:cond-style-name=""><text:span text:style-name="a1507" text:class-names="">Except for one<text:s text:c="1"/></text:span><text:span text:style-name="a1508" text:class-names="">anomalies</text:span><text:span text:style-name="a1509" text:class-names=""/></text:p>
          </draw:text-box>
          <svg:title/>
          <svg:desc/>
        </draw:frame>
      </draw:page>
      <draw:page draw:name="Slide51" draw:style-name="a1512" draw:master-page-name="Master2-Layout2-obj-Title-and-Content" presentation:presentation-page-layout-name="Master2-PPL2" draw:id="Slide-306">
        <draw:frame draw:id="id216" presentation:style-name="a1516" draw:name="Slide Number Placeholder 9" svg:x="12.94979in" svg:y="6.98961in" svg:width="0.24792in" svg:height="0.28333in" presentation:class="page-number" presentation:placeholder="false">
          <draw:text-box>
            <text:p text:style-name="a1515" text:class-names="" text:cond-style-name=""><text:span text:style-name="a1513" text:class-names=""><text:page-number style:num-format="1" text:fixed="false"/></text:span><text:span text:style-name="a1514" text:class-names=""/></text:p>
          </draw:text-box>
          <svg:title/>
          <svg:desc/>
        </draw:frame>
        <draw:frame draw:id="id217" draw:style-name="a1520" draw:name="Title 1" svg:x="0.50806in" svg:y="0.15199in" svg:width="11.5in" svg:height="0.80781in">
          <draw:text-box>
            <text:p text:style-name="a1519" text:class-names="" text:cond-style-name=""><text:span text:style-name="a1517" text:class-names="">Experimental Results</text:span><text:span text:style-name="a1518" text:class-names=""/></text:p>
          </draw:text-box>
          <svg:title/>
          <svg:desc/>
        </draw:frame>
        <draw:frame draw:id="id218" draw:style-name="a1521" draw:name="Picture 3" svg:x="4.66361in" svg:y="1.95874in" svg:width="8.52149in" svg:height="4.78898in" style:rel-width="scale" style:rel-height="scale">
          <draw:image xlink:href="media/image5.png" xlink:type="simple" xlink:show="embed" xlink:actuate="onLoad"/>
          <svg:title/>
          <svg:desc/>
        </draw:frame>
        <draw:frame draw:id="id220" draw:style-name="a1525" draw:name="Content Placeholder 2" svg:x="0.50581in" svg:y="1.46364in" svg:width="7.3544in" svg:height="0.60586in">
          <draw:text-box>
            <text:p text:style-name="a1524" text:class-names="" text:cond-style-name="" text:id="id219"><text:span text:style-name="a1522" text:class-names="">HPC architecture</text:span><text:span text:style-name="a1523" text:class-names=""/></text:p>
          </draw:text-box>
          <svg:title/>
          <svg:desc/>
        </draw:frame>
        <draw:frame draw:id="id221" draw:style-name="a1526" draw:name="Picture 6" svg:x="0.50245in" svg:y="2.47848in" svg:width="4.15575in" svg:height="2.5530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52" draw:style-name="a1527" draw:master-page-name="Master2-Layout2-obj-Title-and-Content" presentation:presentation-page-layout-name="Master2-PPL2" draw:id="Slide-307">
        <draw:frame draw:id="id222" presentation:style-name="a1531" draw:name="Slide Number Placeholder 9" svg:x="12.94979in" svg:y="6.98961in" svg:width="0.24792in" svg:height="0.28333in" presentation:class="page-number" presentation:placeholder="false">
          <draw:text-box>
            <text:p text:style-name="a1530" text:class-names="" text:cond-style-name=""><text:span text:style-name="a1528" text:class-names=""><text:page-number style:num-format="1" text:fixed="false">9</text:page-number></text:span><text:span text:style-name="a1529" text:class-names=""/></text:p>
          </draw:text-box>
          <svg:title/>
          <svg:desc/>
        </draw:frame>
        <draw:frame draw:id="id223" draw:style-name="a1535" draw:name="Title 1" svg:x="0.50806in" svg:y="0.15199in" svg:width="11.5in" svg:height="0.80781in">
          <draw:text-box>
            <text:p text:style-name="a1534" text:class-names="" text:cond-style-name=""><text:span text:style-name="a1532" text:class-names="">Experimental Results</text:span><text:span text:style-name="a1533" text:class-names=""/></text:p>
          </draw:text-box>
          <svg:title/>
          <svg:desc/>
        </draw:frame>
        <draw:frame draw:id="id224" draw:style-name="a1536" draw:name="Picture 4" svg:x="6.13213in" svg:y="1.55565in" svg:width="7.06689in" svg:height="5.18914in" style:rel-width="scale" style:rel-height="scale">
          <draw:image xlink:href="media/image7.png" xlink:type="simple" xlink:show="embed" xlink:actuate="onLoad"/>
          <svg:title/>
          <svg:desc/>
        </draw:frame>
        <draw:frame draw:id="id226" draw:style-name="a1541" draw:name="Content Placeholder 2" svg:x="0.50581in" svg:y="1.46364in" svg:width="7.3544in" svg:height="0.60586in">
          <draw:text-box>
            <text:p text:style-name="a1540" text:class-names="" text:cond-style-name="" text:id="id225"><text:span text:style-name="a1537" text:class-names="">HPC<text:s text:c="1"/></text:span><text:span text:style-name="a1538" text:class-names="">hypothesis</text:span><text:span text:style-name="a1539" text:class-names=""/></text:p>
          </draw:text-box>
          <svg:title/>
          <svg:desc/>
        </draw:frame>
        <draw:frame draw:id="id235" draw:style-name="a1562" draw:name="Content Placeholder 2" svg:x="0.50623in" svg:y="2.30559in" svg:width="7.83177in" svg:height="3.50052in">
          <draw:text-box>
            <text:p text:style-name="a1544" text:class-names="" text:cond-style-name="" text:id="id227"><text:span text:style-name="a1542" text:class-names="">500/2 (two nodes)</text:span><text:span text:style-name="a1543" text:class-names=""/></text:p>
            <text:p text:style-name="a1546" text:class-names="" text:cond-style-name="" text:id="id228"><text:span text:style-name="a1545" text:class-names=""/></text:p>
            <text:p text:style-name="a1548" text:class-names="" text:cond-style-name="" text:id="id229"><text:span text:style-name="a1547" text:class-names="">250x250=62500 [float]</text:span></text:p>
            <text:p text:style-name="a1550" text:class-names="" text:cond-style-name="" text:id="id230"><text:span text:style-name="a1549" text:class-names="">=250000byte ~ 244 [KB]</text:span></text:p>
            <text:p text:style-name="a1552" text:class-names="" text:cond-style-name="" text:id="id231"><text:span text:style-name="a1551" text:class-names=""/></text:p>
            <text:p text:style-name="a1555" text:class-names="" text:cond-style-name="" text:id="id232"><text:span text:style-name="a1553" text:class-names="">244 [KB]x5 ~ 1.19 [MB]</text:span><text:span text:style-name="a1554" text:class-names=""/></text:p>
            <text:p text:style-name="a1557" text:class-names="" text:cond-style-name="" text:id="id233"><text:span text:style-name="a1556" text:class-names=""/></text:p>
            <text:p text:style-name="a1561" text:class-names="" text:cond-style-name="" text:id="id234"><text:span text:style-name="a1558" text:class-names="">All<text:s text:c="1"/></text:span><text:span text:style-name="a1559" text:class-names="">matrices</text:span><text:span text:style-name="a1560" text:class-names=""><text:s text:c="1"/>are in L2</text:span></text:p>
          </draw:text-box>
          <svg:title/>
          <svg:desc/>
        </draw:frame>
      </draw:page>
      <draw:page draw:name="Slide53" draw:style-name="a1563" draw:master-page-name="Master2-Layout2-obj-Title-and-Content" presentation:presentation-page-layout-name="Master2-PPL2" draw:id="Slide-308">
        <draw:frame draw:id="id236" presentation:style-name="a1567" draw:name="Slide Number Placeholder 9" svg:x="12.94979in" svg:y="6.98961in" svg:width="0.24792in" svg:height="0.28333in" presentation:class="page-number" presentation:placeholder="false">
          <draw:text-box>
            <text:p text:style-name="a1566" text:class-names="" text:cond-style-name=""><text:span text:style-name="a1564" text:class-names=""><text:page-number style:num-format="1" text:fixed="false">10</text:page-number></text:span><text:span text:style-name="a1565" text:class-names=""/></text:p>
          </draw:text-box>
          <svg:title/>
          <svg:desc/>
        </draw:frame>
        <draw:frame draw:id="id237" draw:style-name="a1571" draw:name="Title 1" svg:x="0.50806in" svg:y="0.15199in" svg:width="11.5in" svg:height="0.80781in">
          <draw:text-box>
            <text:p text:style-name="a1570" text:class-names="" text:cond-style-name=""><text:span text:style-name="a1568" text:class-names="">Experimental Results</text:span><text:span text:style-name="a1569" text:class-names=""/></text:p>
          </draw:text-box>
          <svg:title/>
          <svg:desc/>
        </draw:frame>
        <draw:frame draw:id="id238" draw:style-name="a1572" draw:name="Picture 13" svg:x="4.33935in" svg:y="1.36157in" svg:width="8.93977in" svg:height="5.35883in" style:rel-width="scale" style:rel-height="scale">
          <draw:image xlink:href="media/image4.jpeg" xlink:type="simple" xlink:show="embed" xlink:actuate="onLoad"/>
          <svg:title/>
          <svg:desc/>
        </draw:frame>
        <draw:frame draw:id="id239" draw:style-name="a1577" draw:name="Content Placeholder 2" svg:x="0.50581in" svg:y="1.46364in" svg:width="7.3544in" svg:height="0.60586in">
          <draw:text-box>
            <text:p text:style-name="a1576" text:class-names="" text:cond-style-name=""><text:span text:style-name="a1573" text:class-names="">HPC<text:s text:c="1"/></text:span><text:span text:style-name="a1574" text:class-names="">hypothesis</text:span><text:span text:style-name="a1575" text:class-names=""/></text:p>
          </draw:text-box>
          <svg:title/>
          <svg:desc/>
        </draw:frame>
        <draw:frame draw:id="id240" draw:style-name="a1590" draw:name="Content Placeholder 2" svg:x="0.50623in" svg:y="3.159in" svg:width="3.98639in" svg:height="1.75026in">
          <draw:text-box>
            <text:p text:style-name="a1581" text:class-names="" text:cond-style-name=""><text:span text:style-name="a1578" text:class-names="">The main<text:s text:c="1"/></text:span><text:span text:style-name="a1579" text:class-names="">hypothesis</text:span><text:span text:style-name="a1580" text:class-names=""><text:s text:c="1"/>are:</text:span></text:p>
            <text:list text:style-name="a1584">
              <text:list-item>
                <text:p text:style-name="a1583" text:class-names="" text:cond-style-name=""><text:span text:style-name="a1582" text:class-names="">Cache miss 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5" text:class-names="">Hardware<text:s text:c="1"/></text:span><text:span text:style-name="a1586" text:class-names="">conflict</text:span><text:span text:style-name="a1587" text:class-names=""/></text:p>
              </text:list-item>
            </text:list>
          </draw:text-box>
          <svg:title/>
          <svg:desc/>
        </draw:frame>
      </draw:page>
      <draw:page draw:name="Slide50" draw:style-name="a1591" draw:master-page-name="Master2-Layout3-obj-Two-Content" presentation:presentation-page-layout-name="Master2-PPL3" draw:id="Slide-305">
        <draw:frame draw:id="id241" draw:style-name="a1595" draw:name="Title 1" svg:x="0.36871in" svg:y="0.14907in" svg:width="12.59591in" svg:height="0.69444in">
          <draw:text-box>
            <text:p text:style-name="a1594" text:class-names="" text:cond-style-name=""><text:span text:style-name="a1592" text:class-names="">Experimental Results</text:span><text:span text:style-name="a1593" text:class-names=""/></text:p>
          </draw:text-box>
          <svg:title/>
          <svg:desc/>
        </draw:frame>
        <draw:frame draw:id="id242" draw:style-name="a1596" draw:name="Picture 2" svg:x="0.00402in" svg:y="1.725in" svg:width="7.80755in" svg:height="4.95015in" style:rel-width="scale" style:rel-height="scale">
          <draw:image xlink:href="media/image8.png" xlink:type="simple" xlink:show="embed" xlink:actuate="onLoad"/>
          <svg:title/>
          <svg:desc/>
        </draw:frame>
        <draw:frame draw:id="id248" presentation:style-name="a1620" draw:name="Content Placeholder 3" svg:x="7.48916in" svg:y="1.725in" svg:width="5.17751in" svg:height="4.20736in" presentation:class="outline" presentation:placeholder="false">
          <draw:text-box>
            <text:list text:style-name="a1601">
              <text:list-item>
                <text:p text:style-name="a1600" text:class-names="" text:cond-style-name="" text:id="id243"><text:span text:style-name="a1597" text:class-names="">Memory footprint scales quadratically O(n</text:span><text:span text:style-name="a1598" text:class-names="">2</text:span><text:span text:style-name="a1599" text:class-names="">) with matrix size,<text:s text:c="1"/></text:span></text:p>
              </text:list-item>
            </text:list>
            <text:list text:style-name="a1604">
              <text:list-item>
                <text:p text:style-name="a1603" text:class-names="" text:cond-style-name="" text:id="id244"><text:span text:style-name="a1602" text:class-names=""/></text:p>
              </text:list-item>
            </text:list>
            <text:list text:style-name="a1612">
              <text:list-item>
                <text:p text:style-name="a1611" text:class-names="" text:cond-style-name="" text:id="id245"><text:span text:style-name="a1605" text:class-names="">while<text:s text:c="1"/></text:span><text:span text:style-name="a1606" text:class-names="">computational load scales<text:s text:c="1"/></text:span><text:span text:style-name="a1607" text:class-names="">cubically O(n</text:span><text:span text:style-name="a1608" text:class-names="">3</text:span><text:span text:style-name="a1609" text:class-names="">),</text:span><text:span text:style-name="a1610" text:class-names=""/></text:p>
              </text:list-item>
            </text:list>
            <text:list text:style-name="a1615">
              <text:list-item>
                <text:p text:style-name="a1614" text:class-names="" text:cond-style-name="" text:id="id246"><text:span text:style-name="a1613" text:class-names=""/></text:p>
              </text:list-item>
            </text:list>
            <text:list text:style-name="a1619">
              <text:list-item>
                <text:p text:style-name="a1618" text:class-names="" text:cond-style-name="" text:id="id247"><text:span text:style-name="a1616" text:class-names=""> highlighting the need for<text:s text:c="1"/></text:span><text:span text:style-name="a1617" text:class-names="">efficient parallelization to manage execution time.</text:span></text:p>
              </text:list-item>
            </text:list>
          </draw:text-box>
          <svg:title/>
          <svg:desc/>
        </draw:frame>
        <draw:frame draw:id="id249" presentation:style-name="a1624" draw:name="Slide Number Placeholder 9" svg:x="12.94979in" svg:y="6.98961in" svg:width="0.24792in" svg:height="0.28333in" presentation:class="page-number" presentation:placeholder="false">
          <draw:text-box>
            <text:p text:style-name="a1623" text:class-names="" text:cond-style-name=""><text:span text:style-name="a1621" text:class-names=""><text:page-number style:num-format="1" text:fixed="false"/></text:span><text:span text:style-name="a1622" text:class-names=""/></text:p>
          </draw:text-box>
          <svg:title/>
          <svg:desc/>
        </draw:frame>
      </draw:page>
      <draw:page draw:name="Slide25" draw:style-name="a1625" draw:master-page-name="Master2-Layout2-obj-Title-and-Content" presentation:presentation-page-layout-name="Master2-PPL2" draw:id="Slide-280">
        <draw:frame draw:id="id250" presentation:style-name="a1629" draw:name="Slide Number Placeholder 9" svg:x="12.94979in" svg:y="6.98961in" svg:width="0.24792in" svg:height="0.28333in" presentation:class="page-number" presentation:placeholder="false">
          <draw:text-box>
            <text:p text:style-name="a1628" text:class-names="" text:cond-style-name=""><text:span text:style-name="a1626" text:class-names=""><text:page-number style:num-format="1" text:fixed="false"/></text:span><text:span text:style-name="a1627" text:class-names=""/></text:p>
          </draw:text-box>
          <svg:title/>
          <svg:desc/>
        </draw:frame>
        <draw:frame draw:id="id251" draw:style-name="a1633" draw:name="Title 1" svg:x="0.50806in" svg:y="0.15199in" svg:width="11.5in" svg:height="0.80781in">
          <draw:text-box>
            <text:p text:style-name="a1632" text:class-names="" text:cond-style-name=""><text:span text:style-name="a1630" text:class-names="">Conclusions</text:span><text:span text:style-name="a1631" text:class-names=""/></text:p>
          </draw:text-box>
          <svg:title/>
          <svg:desc/>
        </draw:frame>
        <draw:frame draw:id="id257" draw:style-name="a1664" draw:name="Content Placeholder 2" svg:x="0.74554in" svg:y="1.34948in" svg:width="11.82929in" svg:height="4.54395in">
          <draw:text-box>
            <text:list text:style-name="a1639">
              <text:list-item>
                <text:p text:style-name="a1638" text:class-names="" text:cond-style-name="" text:id="id252"><text:span text:style-name="a1634" text:class-names="">Amdahl’s Law:</text:span><text:span text:style-name="a1635" text:class-names=""><text:s text:c="1"/>Speedup is strictly limited by the<text:s text:c="1"/></text:span><text:span text:style-name="a1636" text:class-names="">serial bottleneck</text:span><text:span text:style-name="a1637" text:class-names=""><text:s text:c="1"/>of MPI communication.</text:span></text:p>
              </text:list-item>
            </text:list>
            <text:list text:style-name="a1642">
              <text:list-item>
                <text:p text:style-name="a1641" text:class-names="" text:cond-style-name="" text:id="id253"><text:span text:style-name="a1640" text:class-names=""/></text:p>
              </text:list-item>
            </text:list>
            <text:list text:style-name="a1648">
              <text:list-item>
                <text:p text:style-name="a1647" text:class-names="" text:cond-style-name="" text:id="id254"><text:span text:style-name="a1643" text:class-names="">Non-parallelizable Overhead:</text:span><text:span text:style-name="a1644" text:class-names=""> Some operation like matrix read/write and work fragmentation is non-</text:span><text:span text:style-name="a1645" text:class-names="">parallelizable</text:span><text:span text:style-name="a1646" text:class-names=""/></text:p>
              </text:list-item>
            </text:list>
            <text:list text:style-name="a1651">
              <text:list-item>
                <text:p text:style-name="a1650" text:class-names="" text:cond-style-name="" text:id="id255"><text:span text:style-name="a1649" text:class-names=""/></text:p>
              </text:list-item>
            </text:list>
            <text:list text:style-name="a1663">
              <text:list-item>
                <text:p text:style-name="a1662" text:class-names="" text:cond-style-name="" text:id="id256"><text:span text:style-name="a1652" text:class-names="">Scaling Divergence:</text:span><text:span text:style-name="a1653" text:class-names=""><text:s text:c="1"/>Memory follows<text:s text:c="1"/></text:span><text:span text:style-name="a1654" text:class-names="">O(N</text:span><text:span text:style-name="a1655" text:class-names="">2</text:span><text:span text:style-name="a1656" text:class-names="">)</text:span><text:span text:style-name="a1657" text:class-names="">, while computational load follows<text:s text:c="1"/></text:span><text:span text:style-name="a1658" text:class-names="">O(N</text:span><text:span text:style-name="a1659" text:class-names="">3</text:span><text:span text:style-name="a1660" text:class-names="">)</text:span><text:span text:style-name="a1661" text:class-names=""/></text:p>
              </text:list-item>
            </text:list>
          </draw:text-box>
          <svg:title/>
          <svg:desc/>
        </draw:frame>
      </draw:page>
      <draw:page draw:name="Slide44" draw:style-name="a1665" draw:master-page-name="Master1-Layout1-title-Title-Slide" presentation:presentation-page-layout-name="Master1-PPL1" draw:id="Slide-299">
        <draw:custom-shape svg:x="-2.9801in" svg:y="0in" svg:width="13.30108in" svg:height="7.5in" draw:id="id258" draw:style-name="a1669" draw:name="Freeform 3">
          <svg:title/>
          <svg:desc/>
          <text:p text:style-name="a1667" text:class-names="" text:cond-style-name=""><text:span text:style-name="a1666" text:class-names=""/></text:p>
          <draw:enhanced-geometry xmlns:dr3d="urn:oasis:names:tc:opendocument:xmlns:dr3d:1.0" draw:type="non-primitive" svg:viewBox="0 0 16148304 9144000" draw:enhanced-path="M 0 0 L 16148304 0 16148304 9144000 0 9144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148304"/>
            <draw:equation draw:name="f7" draw:formula="?f4 / 9144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59" presentation:style-name="a1672" draw:name="Title 1" svg:x="4.87755in" svg:y="2.9705in" svg:width="4.0102in" svg:height="0.99983in" presentation:class="title" presentation:placeholder="false">
          <draw:text-box>
            <text:p text:style-name="a1671" text:class-names="" text:cond-style-name=""><text:span text:style-name="a1670" text:class-names="">CUDA</text:span></text:p>
          </draw:text-box>
          <svg:title/>
          <svg:desc/>
        </draw:frame>
        <draw:frame draw:id="id260" presentation:style-name="a1675" draw:name="Subtitle 2" svg:x="4.43432in" svg:y="4.35042in" svg:width="4.8547in" svg:height="0.59548in" presentation:class="subtitle" presentation:placeholder="false">
          <draw:text-box>
            <text:p text:style-name="a1674" text:class-names="" text:cond-style-name=""><text:span text:style-name="a1673" text:class-names="">Fabio Garrone <text:s text:c="4"/>s349449</text:span></text:p>
          </draw:text-box>
          <svg:title/>
          <svg:desc/>
        </draw:frame>
        <draw:g draw:name="Group 4" draw:id="id261">
          <svg:title/>
          <svg:desc/>
          <draw:custom-shape svg:x="0.67667in" svg:y="5.91667in" svg:width="2.37in" svg:height="1.04167in" draw:id="id264" draw:style-name="a1687" draw:name="Freeform 5">
            <svg:title/>
            <svg:desc/>
            <text:p text:style-name="a1685" text:class-names="" text:cond-style-name=""><text:span text:style-name="a1684" text:class-names=""/></text:p>
            <draw:enhanced-geometry xmlns:dr3d="urn:oasis:names:tc:opendocument:xmlns:dr3d:1.0" draw:type="non-primitive" svg:viewBox="0 0 2889504 1270000" draw:enhanced-path="M 0 0 L 2889504 0 2889504 1270000 0 1270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89504"/>
              <draw:equation draw:name="f7" draw:formula="?f4 / 1270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custom-shape svg:x="4.87755in" svg:y="4.13537in" svg:width="4.0102in" svg:height="0.05in" draw:id="id262" draw:style-name="a1679" draw:name="Freeform 6">
          <svg:title/>
          <svg:desc/>
          <text:p text:style-name="a1677" text:class-names="" text:cond-style-name=""><text:span text:style-name="a1676" text:class-names=""/></text:p>
          <draw:enhanced-geometry xmlns:dr3d="urn:oasis:names:tc:opendocument:xmlns:dr3d:1.0" draw:type="non-primitive" svg:viewBox="0 0 1552318 41148" draw:enhanced-path="M 0 0 L 1552318 0 1552318 41148 0 41148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52318"/>
            <draw:equation draw:name="f7" draw:formula="?f4 / 4114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63" presentation:style-name="a1683" draw:name="Slide Number Placeholder 18" svg:x="9.41667in" svg:y="6.95139in" svg:width="3in" svg:height="0.39931in" presentation:class="page-number" presentation:placeholder="false">
          <draw:text-box>
            <text:p text:style-name="a1682" text:class-names="" text:cond-style-name=""><text:span text:style-name="a1680" text:class-names=""><text:page-number style:num-format="1" text:fixed="false"/></text:span><text:span text:style-name="a1681" text:class-names=""/></text:p>
          </draw:text-box>
          <svg:title/>
          <svg:desc/>
        </draw:frame>
      </draw:page>
      <draw:page draw:name="Slide26" draw:style-name="a1688" draw:master-page-name="Master2-Layout2-obj-Title-and-Content" presentation:presentation-page-layout-name="Master2-PPL2" draw:id="Slide-281">
        <draw:frame draw:id="id265" presentation:style-name="a1692" draw:name="Slide Number Placeholder 9" svg:x="12.94979in" svg:y="6.98961in" svg:width="0.24792in" svg:height="0.28333in" presentation:class="page-number" presentation:placeholder="false">
          <draw:text-box>
            <text:p text:style-name="a1691" text:class-names="" text:cond-style-name=""><text:span text:style-name="a1689" text:class-names=""><text:page-number style:num-format="1" text:fixed="false"/></text:span><text:span text:style-name="a1690" text:class-names=""/></text:p>
          </draw:text-box>
          <svg:title/>
          <svg:desc/>
        </draw:frame>
        <draw:frame draw:id="id266" draw:style-name="a1696" draw:name="Title 1" svg:x="0.50806in" svg:y="0.15199in" svg:width="11.5in" svg:height="0.80781in">
          <draw:text-box>
            <text:p text:style-name="a1695" text:class-names="" text:cond-style-name=""><text:span text:style-name="a1693" text:class-names="">Exercise Overview: CUDA</text:span><text:span text:style-name="a1694" text:class-names=""/></text:p>
          </draw:text-box>
          <svg:title/>
          <svg:desc/>
        </draw:frame>
        <draw:frame draw:id="id267" draw:style-name="a1718" draw:name="Content Placeholder 2" svg:x="0.50806in" svg:y="1.5212in" svg:width="11.5in" svg:height="4.24102in">
          <draw:text-box>
            <text:list text:style-name="a1699">
              <text:list-item>
                <text:p text:style-name="a1698" text:class-names="" text:cond-style-name=""><text:span text:style-name="a1697" text:class-names="">Introduction</text:span></text:p>
              </text:list-item>
            </text:list>
            <text:list text:style-name="a1702">
              <text:list-item>
                <text:p text:style-name="a1701" text:class-names="" text:cond-style-name=""><text:span text:style-name="a1700" text:class-names=""/></text:p>
              </text:list-item>
            </text:list>
            <text:list text:style-name="a1705">
              <text:list-item>
                <text:p text:style-name="a1704" text:class-names="" text:cond-style-name=""><text:span text:style-name="a1703" text:class-names="">Solution Description<text:s text:c="1"/></text:span></text:p>
              </text:list-item>
            </text:list>
            <text:list text:style-name="a1708">
              <text:list-item>
                <text:p text:style-name="a1707" text:class-names="" text:cond-style-name=""><text:span text:style-name="a1706" text:class-names=""/></text:p>
              </text:list-item>
            </text:list>
            <text:list text:style-name="a1711">
              <text:list-item>
                <text:p text:style-name="a1710" text:class-names="" text:cond-style-name=""><text:span text:style-name="a1709" text:class-names="">Experimental Results<text:s text:c="1"/></text:span></text:p>
              </text:list-item>
            </text:list>
            <text:list text:style-name="a1714">
              <text:list-item>
                <text:p text:style-name="a1713" text:class-names="" text:cond-style-name=""><text:span text:style-name="a1712" text:class-names=""/></text:p>
              </text:list-item>
            </text:list>
            <text:list text:style-name="a1717">
              <text:list-item>
                <text:p text:style-name="a1716" text:class-names="" text:cond-style-name=""><text:span text:style-name="a1715" text:class-names="">Conclusions</text:span></text:p>
              </text:list-item>
            </text:list>
          </draw:text-box>
          <svg:title/>
          <svg:desc/>
        </draw:frame>
      </draw:page>
      <draw:page draw:name="Slide27" draw:style-name="a1719" draw:master-page-name="Master2-Layout2-obj-Title-and-Content" presentation:presentation-page-layout-name="Master2-PPL2" draw:id="Slide-282">
        <draw:frame draw:id="id268" presentation:style-name="a1723" draw:name="Slide Number Placeholder 9" svg:x="12.94979in" svg:y="6.98961in" svg:width="0.24792in" svg:height="0.28333in" presentation:class="page-number" presentation:placeholder="false">
          <draw:text-box>
            <text:p text:style-name="a1722" text:class-names="" text:cond-style-name=""><text:span text:style-name="a1720" text:class-names=""><text:page-number style:num-format="1" text:fixed="false"/></text:span><text:span text:style-name="a1721" text:class-names=""/></text:p>
          </draw:text-box>
          <svg:title/>
          <svg:desc/>
        </draw:frame>
        <draw:frame draw:id="id269" draw:style-name="a1727" draw:name="Title 1" svg:x="0.50806in" svg:y="0.15199in" svg:width="11.5in" svg:height="0.80781in">
          <draw:text-box>
            <text:p text:style-name="a1726" text:class-names="" text:cond-style-name=""><text:span text:style-name="a1724" text:class-names="">Introduction</text:span><text:span text:style-name="a1725" text:class-names=""/></text:p>
          </draw:text-box>
          <svg:title/>
          <svg:desc/>
        </draw:frame>
        <draw:frame draw:id="id270" draw:style-name="a1733" draw:name="Content Placeholder 2" svg:x="0.91666in" svg:y="1.44064in" svg:width="11.5in" svg:height="1.41367in">
          <draw:text-box>
            <text:p text:style-name="a1729" text:class-names="" text:cond-style-name=""><text:span text:style-name="a1728" text:class-names="">Application of a low-pass filter to images with Salt-Pepper Noise through convolution</text:span></text:p>
            <text:list text:style-name="a1732">
              <text:list-item>
                <text:p text:style-name="a1731" text:class-names="" text:cond-style-name=""><text:span text:style-name="a1730" text:class-names=""/></text:p>
              </text:list-item>
            </text:list>
          </draw:text-box>
          <svg:title/>
          <svg:desc/>
        </draw:frame>
        <draw:frame draw:id="id271" draw:style-name="a1734" draw:name="Immagine 4" svg:x="5.08811in" svg:y="4.64569in" svg:width="3.15711in" svg:height="2.09679in" style:rel-width="scale" style:rel-height="scale">
          <draw:image xlink:href="media/image9.png" xlink:type="simple" xlink:show="embed" xlink:actuate="onLoad"/>
          <svg:title/>
          <svg:desc/>
        </draw:frame>
        <draw:frame draw:id="id272" draw:style-name="a1735" draw:name="Immagine 6" svg:x="3.16831in" svg:y="3.06757in" svg:width="6.9967in" svg:height="1.36486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41" draw:style-name="a1736" draw:master-page-name="Master2-Layout2-obj-Title-and-Content" presentation:presentation-page-layout-name="Master2-PPL2" draw:id="Slide-296">
        <draw:frame draw:id="id273" presentation:style-name="a1740" draw:name="Slide Number Placeholder 9" svg:x="12.94979in" svg:y="6.98961in" svg:width="0.24792in" svg:height="0.28333in" presentation:class="page-number" presentation:placeholder="false">
          <draw:text-box>
            <text:p text:style-name="a1739" text:class-names="" text:cond-style-name=""><text:span text:style-name="a1737" text:class-names=""><text:page-number style:num-format="1" text:fixed="false"/></text:span><text:span text:style-name="a1738" text:class-names=""/></text:p>
          </draw:text-box>
          <svg:title/>
          <svg:desc/>
        </draw:frame>
        <draw:frame draw:id="id274" draw:style-name="a1744" draw:name="Title 1" svg:x="0.50806in" svg:y="0.15199in" svg:width="11.5in" svg:height="0.80781in">
          <draw:text-box>
            <text:p text:style-name="a1743" text:class-names="" text:cond-style-name=""><text:span text:style-name="a1741" text:class-names="">Introduction</text:span><text:span text:style-name="a1742" text:class-names=""/></text:p>
          </draw:text-box>
          <svg:title/>
          <svg:desc/>
        </draw:frame>
        <draw:frame draw:id="id275" draw:style-name="a1776" draw:name="Content Placeholder 2" svg:x="0.50806in" svg:y="1.63094in" svg:width="11.5in" svg:height="5.65469in">
          <draw:text-box>
            <text:list text:style-name="a1747">
              <text:list-item>
                <text:p text:style-name="a1746" text:class-names="" text:cond-style-name=""><text:span text:style-name="a1745" text:class-names="">Different resolution: 4K, 8K and 16K</text:span></text:p>
              </text:list-item>
            </text:list>
            <text:list text:style-name="a1750">
              <text:list-item>
                <text:p text:style-name="a1749" text:class-names="" text:cond-style-name=""><text:span text:style-name="a1748" text:class-names=""/></text:p>
              </text:list-item>
            </text:list>
            <text:list text:style-name="a1755">
              <text:list-item>
                <text:p text:style-name="a1754" text:class-names="" text:cond-style-name=""><text:span text:style-name="a1751" text:class-names="">Different percentage of noise<text:s text:c="1"/></text:span><text:span text:style-name="a1752" text:class-names=""></text:span><text:span text:style-name="a1753" text:class-names=""><text:s text:c="1"/>50%, 75% and 90%.</text:span></text:p>
              </text:list-item>
            </text:list>
            <text:p text:style-name="a1757" text:class-names="" text:cond-style-name=""><text:span text:style-name="a1756" text:class-names=""/></text:p>
            <text:list text:style-name="a1760">
              <text:list-item>
                <text:p text:style-name="a1759" text:class-names="" text:cond-style-name=""><text:span text:style-name="a1758" text:class-names="">Performance evaluation based on the number of utilized Blocks (8, 16 ,32) and number of GPUs.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/></text:p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>Every variable changes (image, n° of blocks, …) had 10 run to get more precise timing</text:span></text:p>
              </text:list-item>
            </text:list>
            <text:list text:style-name="a1769">
              <text:list-item>
                <text:p text:style-name="a1768" text:class-names="" text:cond-style-name=""><text:span text:style-name="a1767" text:class-names=""/></text:p>
              </text:list-item>
            </text:list>
            <text:list text:style-name="a1772">
              <text:list-item>
                <text:p text:style-name="a1771" text:class-names="" text:cond-style-name=""><text:span text:style-name="a1770" text:class-names=""/></text:p>
              </text:list-item>
            </text:list>
            <text:list text:style-name="a1775">
              <text:list-item>
                <text:p text:style-name="a1774" text:class-names="" text:cond-style-name=""><text:span text:style-name="a1773" text:class-names=""/></text:p>
              </text:list-item>
            </text:list>
          </draw:text-box>
          <svg:title/>
          <svg:desc/>
        </draw:frame>
      </draw:page>
      <draw:page draw:name="Slide28" draw:style-name="a1777" draw:master-page-name="Master2-Layout2-obj-Title-and-Content" presentation:presentation-page-layout-name="Master2-PPL2" draw:id="Slide-283">
        <draw:frame draw:id="id276" presentation:style-name="a1781" draw:name="Slide Number Placeholder 9" svg:x="12.94979in" svg:y="6.98961in" svg:width="0.24792in" svg:height="0.28333in" presentation:class="page-number" presentation:placeholder="false">
          <draw:text-box>
            <text:p text:style-name="a1780" text:class-names="" text:cond-style-name=""><text:span text:style-name="a1778" text:class-names=""><text:page-number style:num-format="1" text:fixed="false"/></text:span><text:span text:style-name="a1779" text:class-names=""/></text:p>
          </draw:text-box>
          <svg:title/>
          <svg:desc/>
        </draw:frame>
        <draw:frame draw:id="id277" draw:style-name="a1785" draw:name="Title 1" svg:x="0.50806in" svg:y="0.15199in" svg:width="11.5in" svg:height="0.80781in">
          <draw:text-box>
            <text:p text:style-name="a1784" text:class-names="" text:cond-style-name=""><text:span text:style-name="a1782" text:class-names="">Solution Description</text:span><text:span text:style-name="a1783" text:class-names=""/></text:p>
          </draw:text-box>
          <svg:title/>
          <svg:desc/>
        </draw:frame>
        <draw:frame draw:id="id278" draw:style-name="a1815" draw:name="Content Placeholder 2" svg:x="0.50806in" svg:y="1.63094in" svg:width="11.5in" svg:height="4.24102in">
          <draw:text-box>
            <text:list text:style-name="a1788">
              <text:list-item>
                <text:p text:style-name="a1787" text:class-names="" text:cond-style-name=""><text:span text:style-name="a1786" text:class-names="">RGB division with the split function of OpenCV<text:s text:c="1"/>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/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>Loop unrolling for the sum (reducing branch divergence)</text:span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/></text:p>
              </text:list-item>
            </text:list>
            <text:list text:style-name="a1802">
              <text:list-item>
                <text:p text:style-name="a1801" text:class-names="" text:cond-style-name=""><text:span text:style-name="a1798" text:class-names="">Halo<text:s text:c="1"/></text:span><text:span text:style-name="a1799" text:class-names="">zone</text:span><text:span text:style-name="a1800" text:class-names=""><text:s text:c="1"/>to avoid repeated operations</text:span></text:p>
              </text:list-item>
            </text:list>
            <text:list text:style-name="a1805">
              <text:list-item>
                <text:p text:style-name="a1804" text:class-names="" text:cond-style-name=""><text:span text:style-name="a1803" text:class-names=""/></text:p>
              </text:list-item>
            </text:list>
            <text:list text:style-name="a1808">
              <text:list-item>
                <text:p text:style-name="a1807" text:class-names="" text:cond-style-name=""><text:span text:style-name="a1806" text:class-names="">W matrix put in constant memory avoiding bottleneck</text:span></text:p>
              </text:list-item>
            </text:list>
            <text:list text:style-name="a1811">
              <text:list-item>
                <text:p text:style-name="a1810" text:class-names="" text:cond-style-name=""><text:span text:style-name="a1809" text:class-names=""/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/></text:p>
              </text:list-item>
            </text:list>
          </draw:text-box>
          <svg:title/>
          <svg:desc/>
        </draw:frame>
      </draw:page>
      <draw:page draw:name="Slide29" draw:style-name="a1816" draw:master-page-name="Master2-Layout2-obj-Title-and-Content" presentation:presentation-page-layout-name="Master2-PPL2" draw:id="Slide-284">
        <draw:frame draw:id="id279" presentation:style-name="a1820" draw:name="Slide Number Placeholder 9" svg:x="12.94979in" svg:y="6.98961in" svg:width="0.24792in" svg:height="0.28333in" presentation:class="page-number" presentation:placeholder="false">
          <draw:text-box>
            <text:p text:style-name="a1819" text:class-names="" text:cond-style-name=""><text:span text:style-name="a1817" text:class-names=""><text:page-number style:num-format="1" text:fixed="false"/></text:span><text:span text:style-name="a1818" text:class-names=""/></text:p>
          </draw:text-box>
          <svg:title/>
          <svg:desc/>
        </draw:frame>
        <draw:frame draw:id="id280" draw:style-name="a1824" draw:name="Title 1" svg:x="0.50806in" svg:y="0.15199in" svg:width="11.5in" svg:height="0.80781in">
          <draw:text-box>
            <text:p text:style-name="a1823" text:class-names="" text:cond-style-name=""><text:span text:style-name="a1821" text:class-names="">Experimental Results</text:span><text:span text:style-name="a1822" text:class-names=""/></text:p>
          </draw:text-box>
          <svg:title/>
          <svg:desc/>
        </draw:frame>
        <draw:g draw:name="Gruppo 6" draw:id="id281">
          <svg:title/>
          <svg:desc/>
          <draw:frame draw:id="id282" draw:style-name="a1825" draw:name="Elemento grafico 3" svg:x="0.67281in" svg:y="1.976in" svg:width="5.98006in" svg:height="3.54801in" style:rel-width="scale" style:rel-height="scale">
            <draw:image xlink:href="media/image11.svg" xlink:type="simple" xlink:show="embed" xlink:actuate="onLoad"/>
            <svg:title/>
            <svg:desc/>
          </draw:frame>
          <draw:frame draw:id="id283" draw:style-name="a1826" draw:name="Elemento grafico 5" svg:x="6.68046in" svg:y="1.976in" svg:width="5.98006in" svg:height="3.54801in" style:rel-width="scale" style:rel-height="scale">
            <draw:image xlink:href="media/image12.svg" xlink:type="simple" xlink:show="embed" xlink:actuate="onLoad"/>
            <svg:title/>
            <svg:desc/>
          </draw:frame>
        </draw:g>
      </draw:page>
      <draw:page draw:name="Slide42" draw:style-name="a1827" draw:master-page-name="Master2-Layout2-obj-Title-and-Content" presentation:presentation-page-layout-name="Master2-PPL2" draw:id="Slide-297">
        <draw:frame draw:id="id284" presentation:style-name="a1831" draw:name="Slide Number Placeholder 9" svg:x="12.94979in" svg:y="6.98961in" svg:width="0.24792in" svg:height="0.28333in" presentation:class="page-number" presentation:placeholder="false">
          <draw:text-box>
            <text:p text:style-name="a1830" text:class-names="" text:cond-style-name=""><text:span text:style-name="a1828" text:class-names=""><text:page-number style:num-format="1" text:fixed="false"/></text:span><text:span text:style-name="a1829" text:class-names=""/></text:p>
          </draw:text-box>
          <svg:title/>
          <svg:desc/>
        </draw:frame>
        <draw:frame draw:id="id285" draw:style-name="a1835" draw:name="Title 1" svg:x="0.50806in" svg:y="0.15199in" svg:width="11.5in" svg:height="0.80781in">
          <draw:text-box>
            <text:p text:style-name="a1834" text:class-names="" text:cond-style-name=""><text:span text:style-name="a1832" text:class-names="">Experimental Results</text:span><text:span text:style-name="a1833" text:class-names=""/></text:p>
          </draw:text-box>
          <svg:title/>
          <svg:desc/>
        </draw:frame>
        <draw:frame draw:id="id286" draw:style-name="a1848" draw:name="Content Placeholder 2" svg:x="0.50806in" svg:y="1.63094in" svg:width="11.5in" svg:height="1.8849in">
          <draw:text-box>
            <text:list text:style-name="a1838">
              <text:list-item>
                <text:p text:style-name="a1837" text:class-names="" text:cond-style-name=""><text:span text:style-name="a1836" text:class-names="">Block size doesn’t impact performance so much</text:span></text:p>
              </text:list-item>
            </text:list>
            <text:list text:style-name="a1841">
              <text:list-item>
                <text:p text:style-name="a1840" text:class-names="" text:cond-style-name=""><text:span text:style-name="a1839" text:class-names=""/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/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>2 GPUs takes more time because of parallelization<text:s text:c="1"/></text:span></text:p>
              </text:list-item>
            </text:list>
          </draw:text-box>
          <svg:title/>
          <svg:desc/>
        </draw:frame>
      </draw:page>
      <draw:page draw:name="Slide40" draw:style-name="a1849" draw:master-page-name="Master2-Layout2-obj-Title-and-Content" presentation:presentation-page-layout-name="Master2-PPL2" draw:id="Slide-295">
        <draw:frame draw:id="id287" presentation:style-name="a1853" draw:name="Slide Number Placeholder 9" svg:x="12.94979in" svg:y="6.98961in" svg:width="0.24792in" svg:height="0.28333in" presentation:class="page-number" presentation:placeholder="false">
          <draw:text-box>
            <text:p text:style-name="a1852" text:class-names="" text:cond-style-name=""><text:span text:style-name="a1850" text:class-names=""><text:page-number style:num-format="1" text:fixed="false"/></text:span><text:span text:style-name="a1851" text:class-names=""/></text:p>
          </draw:text-box>
          <svg:title/>
          <svg:desc/>
        </draw:frame>
        <draw:frame draw:id="id288" draw:style-name="a1857" draw:name="Title 1" svg:x="0.50806in" svg:y="0.15199in" svg:width="11.5in" svg:height="0.80781in">
          <draw:text-box>
            <text:p text:style-name="a1856" text:class-names="" text:cond-style-name=""><text:span text:style-name="a1854" text:class-names="">Experimental Results</text:span><text:span text:style-name="a1855" text:class-names=""/></text:p>
          </draw:text-box>
          <svg:title/>
          <svg:desc/>
        </draw:frame>
        <draw:frame draw:id="id289" draw:style-name="a1858" draw:name="Elemento grafico 3" svg:x="1.86948in" svg:y="0.95981in" svg:width="9.29437in" svg:height="5.61874in" style:rel-width="scale" style:rel-height="scale">
          <draw:image xlink:href="media/image13.svg" xlink:type="simple" xlink:show="embed" xlink:actuate="onLoad"/>
          <svg:title/>
          <svg:desc/>
        </draw:frame>
      </draw:page>
      <draw:page draw:name="Slide46" draw:style-name="a1859" draw:master-page-name="Master2-Layout2-obj-Title-and-Content" presentation:presentation-page-layout-name="Master2-PPL2" draw:id="Slide-301">
        <draw:frame draw:id="id290" presentation:style-name="a1863" draw:name="Slide Number Placeholder 9" svg:x="12.94979in" svg:y="6.98961in" svg:width="0.24792in" svg:height="0.28333in" presentation:class="page-number" presentation:placeholder="false">
          <draw:text-box>
            <text:p text:style-name="a1862" text:class-names="" text:cond-style-name=""><text:span text:style-name="a1860" text:class-names=""><text:page-number style:num-format="1" text:fixed="false"/></text:span><text:span text:style-name="a1861" text:class-names=""/></text:p>
          </draw:text-box>
          <svg:title/>
          <svg:desc/>
        </draw:frame>
        <draw:frame draw:id="id291" draw:style-name="a1867" draw:name="Title 1" svg:x="0.50806in" svg:y="0.15199in" svg:width="11.5in" svg:height="0.80781in">
          <draw:text-box>
            <text:p text:style-name="a1866" text:class-names="" text:cond-style-name=""><text:span text:style-name="a1864" text:class-names="">Experimental Results</text:span><text:span text:style-name="a1865" text:class-names=""/></text:p>
          </draw:text-box>
          <svg:title/>
          <svg:desc/>
        </draw:frame>
        <draw:frame draw:id="id292" draw:style-name="a1877" draw:name="Content Placeholder 2" svg:x="0.50806in" svg:y="1.63094in" svg:width="11.5in" svg:height="2.35612in">
          <draw:text-box>
            <text:list text:style-name="a1870">
              <text:list-item>
                <text:p text:style-name="a1869" text:class-names="" text:cond-style-name=""><text:span text:style-name="a1868" text:class-names="">PSNR doesn’t change too much between resolution for the same level of noise</text:span></text:p>
              </text:list-item>
            </text:list>
            <text:list text:style-name="a1873">
              <text:list-item>
                <text:p text:style-name="a1872" text:class-names="" text:cond-style-name=""><text:span text:style-name="a1871" text:class-names=""/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>The Salt-Pepper noise is assimilable to a Dirac Delta, so this type of filter isn’t efficient</text:span></text:p>
              </text:list-item>
            </text:list>
          </draw:text-box>
          <svg:title/>
          <svg:desc/>
        </draw:frame>
      </draw:page>
      <draw:page draw:name="Slide39" draw:style-name="a1878" draw:master-page-name="Master2-Layout2-obj-Title-and-Content" presentation:presentation-page-layout-name="Master2-PPL2" draw:id="Slide-294">
        <draw:frame draw:id="id293" presentation:style-name="a1882" draw:name="Slide Number Placeholder 9" svg:x="12.94979in" svg:y="6.98961in" svg:width="0.24792in" svg:height="0.28333in" presentation:class="page-number" presentation:placeholder="false">
          <draw:text-box>
            <text:p text:style-name="a1881" text:class-names="" text:cond-style-name=""><text:span text:style-name="a1879" text:class-names=""><text:page-number style:num-format="1" text:fixed="false"/></text:span><text:span text:style-name="a1880" text:class-names=""/></text:p>
          </draw:text-box>
          <svg:title/>
          <svg:desc/>
        </draw:frame>
        <draw:frame draw:id="id294" draw:style-name="a1886" draw:name="Title 1" svg:x="0.50806in" svg:y="0.15199in" svg:width="11.5in" svg:height="0.80781in">
          <draw:text-box>
            <text:p text:style-name="a1885" text:class-names="" text:cond-style-name=""><text:span text:style-name="a1883" text:class-names="">Experimental Results</text:span><text:span text:style-name="a1884" text:class-names=""/></text:p>
          </draw:text-box>
          <svg:title/>
          <svg:desc/>
        </draw:frame>
        <draw:frame draw:id="id295" draw:style-name="a1887" draw:name="Elemento grafico 3" svg:x="1.86948in" svg:y="0.95981in" svg:width="9.29438in" svg:height="5.61874in" style:rel-width="scale" style:rel-height="scale">
          <draw:image xlink:href="media/image14.svg" xlink:type="simple" xlink:show="embed" xlink:actuate="onLoad"/>
          <svg:title/>
          <svg:desc/>
        </draw:frame>
      </draw:page>
      <draw:page draw:name="Slide30" draw:style-name="a1888" draw:master-page-name="Master2-Layout2-obj-Title-and-Content" presentation:presentation-page-layout-name="Master2-PPL2" draw:id="Slide-285">
        <draw:frame draw:id="id296" presentation:style-name="a1892" draw:name="Slide Number Placeholder 9" svg:x="12.94979in" svg:y="6.98961in" svg:width="0.24792in" svg:height="0.28333in" presentation:class="page-number" presentation:placeholder="false">
          <draw:text-box>
            <text:p text:style-name="a1891" text:class-names="" text:cond-style-name=""><text:span text:style-name="a1889" text:class-names=""><text:page-number style:num-format="1" text:fixed="false"/></text:span><text:span text:style-name="a1890" text:class-names=""/></text:p>
          </draw:text-box>
          <svg:title/>
          <svg:desc/>
        </draw:frame>
        <draw:frame draw:id="id297" draw:style-name="a1896" draw:name="Title 1" svg:x="0.50806in" svg:y="0.15199in" svg:width="11.5in" svg:height="0.80781in">
          <draw:text-box>
            <text:p text:style-name="a1895" text:class-names="" text:cond-style-name=""><text:span text:style-name="a1893" text:class-names="">Conclusions</text:span><text:span text:style-name="a1894" text:class-names=""/></text:p>
          </draw:text-box>
          <svg:title/>
          <svg:desc/>
        </draw:frame>
        <draw:frame draw:id="id298" draw:style-name="a1909" draw:name="Content Placeholder 2" svg:x="0.50806in" svg:y="1.63094in" svg:width="11.5in" svg:height="2.35612in">
          <draw:text-box>
            <text:list text:style-name="a1899">
              <text:list-item>
                <text:p text:style-name="a1898" text:class-names="" text:cond-style-name=""><text:span text:style-name="a1897" text:class-names="">Better filter are needed for Salt-Pepper Noise, like Median filter.</text:span></text:p>
              </text:list-item>
            </text:list>
            <text:list text:style-name="a1902">
              <text:list-item>
                <text:p text:style-name="a1901" text:class-names="" text:cond-style-name=""><text:span text:style-name="a1900" text:class-names=""/></text:p>
              </text:list-item>
            </text:list>
            <text:list text:style-name="a1906">
              <text:list-item>
                <text:p text:style-name="a1905" text:class-names="" text:cond-style-name=""><text:span text:style-name="a1903" text:class-names="">Performance<text:s text:c="1"/></text:span><text:span text:style-name="a1904" text:class-names="">is bounded to VRAM Band (GDDR6 vs HBM2)<text:s text:c="1"/></text:span></text:p>
              </text:list-item>
            </text:list>
            <text:p text:style-name="a1908" text:class-names="" text:cond-style-name=""><text:span text:style-name="a1907" text:class-names=""/></text:p>
          </draw:text-box>
          <svg:title/>
          <svg:desc/>
        </draw:frame>
      </draw:page>
      <draw:page draw:name="Slide45" draw:style-name="a1910" draw:master-page-name="Master1-Layout1-title-Title-Slide" presentation:presentation-page-layout-name="Master1-PPL1" draw:id="Slide-300">
        <draw:custom-shape svg:x="-2.9801in" svg:y="0in" svg:width="13.30108in" svg:height="7.5in" draw:id="id299" draw:style-name="a1914" draw:name="Freeform 3">
          <svg:title/>
          <svg:desc/>
          <text:p text:style-name="a1912" text:class-names="" text:cond-style-name=""><text:span text:style-name="a1911" text:class-names=""/></text:p>
          <draw:enhanced-geometry xmlns:dr3d="urn:oasis:names:tc:opendocument:xmlns:dr3d:1.0" draw:type="non-primitive" svg:viewBox="0 0 16148304 9144000" draw:enhanced-path="M 0 0 L 16148304 0 16148304 9144000 0 9144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148304"/>
            <draw:equation draw:name="f7" draw:formula="?f4 / 9144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00" presentation:style-name="a1917" draw:name="Title 1" svg:x="4.87755in" svg:y="2.9705in" svg:width="4.0102in" svg:height="0.99983in" presentation:class="title" presentation:placeholder="false">
          <draw:text-box>
            <text:p text:style-name="a1916" text:class-names="" text:cond-style-name=""><text:span text:style-name="a1915" text:class-names="">Open MP</text:span></text:p>
          </draw:text-box>
          <svg:title/>
          <svg:desc/>
        </draw:frame>
        <draw:frame draw:id="id301" presentation:style-name="a1920" draw:name="Subtitle 2" svg:x="4.43432in" svg:y="4.35042in" svg:width="4.8547in" svg:height="0.59548in" presentation:class="subtitle" presentation:placeholder="false">
          <draw:text-box>
            <text:p text:style-name="a1919" text:class-names="" text:cond-style-name=""><text:span text:style-name="a1918" text:class-names="">Luca Lo Brutto <text:s text:c="4"/>s346285</text:span></text:p>
          </draw:text-box>
          <svg:title/>
          <svg:desc/>
        </draw:frame>
        <draw:g draw:name="Group 4" draw:id="id302">
          <svg:title/>
          <svg:desc/>
          <draw:custom-shape svg:x="0.67667in" svg:y="5.91667in" svg:width="2.37in" svg:height="1.04167in" draw:id="id305" draw:style-name="a1932" draw:name="Freeform 5">
            <svg:title/>
            <svg:desc/>
            <text:p text:style-name="a1930" text:class-names="" text:cond-style-name=""><text:span text:style-name="a1929" text:class-names=""/></text:p>
            <draw:enhanced-geometry xmlns:dr3d="urn:oasis:names:tc:opendocument:xmlns:dr3d:1.0" draw:type="non-primitive" svg:viewBox="0 0 2889504 1270000" draw:enhanced-path="M 0 0 L 2889504 0 2889504 1270000 0 1270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89504"/>
              <draw:equation draw:name="f7" draw:formula="?f4 / 1270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custom-shape svg:x="4.87755in" svg:y="4.13537in" svg:width="4.0102in" svg:height="0.05in" draw:id="id303" draw:style-name="a1924" draw:name="Freeform 6">
          <svg:title/>
          <svg:desc/>
          <text:p text:style-name="a1922" text:class-names="" text:cond-style-name=""><text:span text:style-name="a1921" text:class-names=""/></text:p>
          <draw:enhanced-geometry xmlns:dr3d="urn:oasis:names:tc:opendocument:xmlns:dr3d:1.0" draw:type="non-primitive" svg:viewBox="0 0 1552318 41148" draw:enhanced-path="M 0 0 L 1552318 0 1552318 41148 0 41148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52318"/>
            <draw:equation draw:name="f7" draw:formula="?f4 / 4114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04" presentation:style-name="a1928" draw:name="Slide Number Placeholder 18" svg:x="9.41667in" svg:y="6.95139in" svg:width="3in" svg:height="0.39931in" presentation:class="page-number" presentation:placeholder="false">
          <draw:text-box>
            <text:p text:style-name="a1927" text:class-names="" text:cond-style-name=""><text:span text:style-name="a1925" text:class-names=""><text:page-number style:num-format="1" text:fixed="false"/></text:span><text:span text:style-name="a1926" text:class-names=""/></text:p>
          </draw:text-box>
          <svg:title/>
          <svg:desc/>
        </draw:frame>
      </draw:page>
      <draw:page draw:name="Slide31" draw:style-name="a1933" draw:master-page-name="Master2-Layout2-obj-Title-and-Content" presentation:presentation-page-layout-name="Master2-PPL2" draw:id="Slide-286">
        <draw:frame draw:id="id306" presentation:style-name="a1937" draw:name="Slide Number Placeholder 9" svg:x="12.94979in" svg:y="6.98961in" svg:width="0.24792in" svg:height="0.28333in" presentation:class="page-number" presentation:placeholder="false">
          <draw:text-box>
            <text:p text:style-name="a1936" text:class-names="" text:cond-style-name=""><text:span text:style-name="a1934" text:class-names=""><text:page-number style:num-format="1" text:fixed="false"/></text:span><text:span text:style-name="a1935" text:class-names=""/></text:p>
          </draw:text-box>
          <svg:title/>
          <svg:desc/>
        </draw:frame>
        <draw:frame draw:id="id307" draw:style-name="a1941" draw:name="Title 1" svg:x="0.50806in" svg:y="0.15199in" svg:width="11.5in" svg:height="0.80781in">
          <draw:text-box>
            <text:p text:style-name="a1940" text:class-names="" text:cond-style-name=""><text:span text:style-name="a1938" text:class-names="">Exercise Overview: OpenMP</text:span><text:span text:style-name="a1939" text:class-names=""/></text:p>
          </draw:text-box>
          <svg:title/>
          <svg:desc/>
        </draw:frame>
        <draw:frame draw:id="id308" draw:style-name="a1963" draw:name="Content Placeholder 2" svg:x="0.50806in" svg:y="1.5212in" svg:width="11.5in" svg:height="4.24102in">
          <draw:text-box>
            <text:list text:style-name="a1944">
              <text:list-item>
                <text:p text:style-name="a1943" text:class-names="" text:cond-style-name=""><text:span text:style-name="a1942" text:class-names="">Introduction</text:span></text:p>
              </text:list-item>
            </text:list>
            <text:list text:style-name="a1947">
              <text:list-item>
                <text:p text:style-name="a1946" text:class-names="" text:cond-style-name=""><text:span text:style-name="a1945" text:class-names=""/></text:p>
              </text:list-item>
            </text:list>
            <text:list text:style-name="a1950">
              <text:list-item>
                <text:p text:style-name="a1949" text:class-names="" text:cond-style-name=""><text:span text:style-name="a1948" text:class-names="">Solution Description<text:s text:c="1"/></text:span></text:p>
              </text:list-item>
            </text:list>
            <text:list text:style-name="a1953">
              <text:list-item>
                <text:p text:style-name="a1952" text:class-names="" text:cond-style-name=""><text:span text:style-name="a1951" text:class-names=""/></text:p>
              </text:list-item>
            </text:list>
            <text:list text:style-name="a1956">
              <text:list-item>
                <text:p text:style-name="a1955" text:class-names="" text:cond-style-name=""><text:span text:style-name="a1954" text:class-names="">Experimental Results<text:s text:c="1"/></text:span></text:p>
              </text:list-item>
            </text:list>
            <text:list text:style-name="a1959">
              <text:list-item>
                <text:p text:style-name="a1958" text:class-names="" text:cond-style-name=""><text:span text:style-name="a1957" text:class-names=""/></text:p>
              </text:list-item>
            </text:list>
            <text:list text:style-name="a1962">
              <text:list-item>
                <text:p text:style-name="a1961" text:class-names="" text:cond-style-name=""><text:span text:style-name="a1960" text:class-names="">Conclusions</text:span></text:p>
              </text:list-item>
            </text:list>
          </draw:text-box>
          <svg:title/>
          <svg:desc/>
        </draw:frame>
      </draw:page>
      <draw:page draw:name="Slide32" draw:style-name="a1964" draw:master-page-name="Master2-Layout2-obj-Title-and-Content" presentation:presentation-page-layout-name="Master2-PPL2" draw:id="Slide-287">
        <draw:frame draw:id="id309" presentation:style-name="a1968" draw:name="Slide Number Placeholder 9" svg:x="12.94979in" svg:y="6.98961in" svg:width="0.24792in" svg:height="0.28333in" presentation:class="page-number" presentation:placeholder="false">
          <draw:text-box>
            <text:p text:style-name="a1967" text:class-names="" text:cond-style-name=""><text:span text:style-name="a1965" text:class-names=""><text:page-number style:num-format="1" text:fixed="false"/></text:span><text:span text:style-name="a1966" text:class-names=""/></text:p>
          </draw:text-box>
          <svg:title/>
          <svg:desc/>
        </draw:frame>
        <draw:frame draw:id="id310" draw:style-name="a1972" draw:name="Title 1" svg:x="0.50806in" svg:y="0.15199in" svg:width="11.5in" svg:height="0.80781in">
          <draw:text-box>
            <text:p text:style-name="a1971" text:class-names="" text:cond-style-name=""><text:span text:style-name="a1969" text:class-names="">Introduction</text:span><text:span text:style-name="a1970" text:class-names=""/></text:p>
          </draw:text-box>
          <svg:title/>
          <svg:desc/>
        </draw:frame>
        <draw:frame draw:id="id311" draw:style-name="a2000" draw:name="Content Placeholder 2" svg:x="0.50806in" svg:y="1.63094in" svg:width="11.5in" svg:height="4.71224in">
          <draw:text-box>
            <text:list text:style-name="a1976">
              <text:list-item>
                <text:p text:style-name="a1975" text:class-names="" text:cond-style-name=""><text:span text:style-name="a1973" text:class-names="">Simulation of heat diffusion<text:s text:c="1"/></text:span><text:span text:style-name="a1974" text:class-names="">through an anisotropic 2D metal slab.</text:span></text:p>
              </text:list-item>
            </text:list>
            <text:list text:style-name="a1979">
              <text:list-item>
                <text:p text:style-name="a1978" text:class-names="" text:cond-style-name=""><text:span text:style-name="a1977" text:class-names=""/></text:p>
              </text:list-item>
            </text:list>
            <text:list text:style-name="a1983">
              <text:list-item>
                <text:p text:style-name="a1982" text:class-names="" text:cond-style-name=""><text:span text:style-name="a1980" text:class-names="">Performance optimization<text:s text:c="1"/></text:span><text:span text:style-name="a1981" text:class-names="">achieved using OpenMP.</text:span></text:p>
              </text:list-item>
            </text:list>
            <text:list text:style-name="a1986">
              <text:list-item>
                <text:p text:style-name="a1985" text:class-names="" text:cond-style-name=""><text:span text:style-name="a1984" text:class-names=""/></text:p>
              </text:list-item>
            </text:list>
            <text:list text:style-name="a1990">
              <text:list-item>
                <text:p text:style-name="a1989" text:class-names="" text:cond-style-name=""><text:span text:style-name="a1987" text:class-names="">Performance evaluation based on the number of<text:s text:c="1"/></text:span><text:span text:style-name="a1988" text:class-names="">utilized threads.</text:span></text:p>
              </text:list-item>
            </text:list>
            <text:list text:style-name="a1993">
              <text:list-item>
                <text:p text:style-name="a1992" text:class-names="" text:cond-style-name=""><text:span text:style-name="a1991" text:class-names=""/></text:p>
              </text:list-item>
            </text:list>
            <text:list text:style-name="a1999">
              <text:list-item>
                <text:p text:style-name="a1998" text:class-names="" text:cond-style-name=""><text:span text:style-name="a1994" text:class-names="">Study of the<text:s text:c="1"/></text:span><text:span text:style-name="a1995" text:class-names="">correlation</text:span><text:span text:style-name="a1996" text:class-names=""><text:s text:c="1"/>between elapsed time and iteration count.</text:span><text:span text:style-name="a1997" text:class-names=""/></text:p>
              </text:list-item>
            </text:list>
          </draw:text-box>
          <svg:title/>
          <svg:desc/>
        </draw:frame>
      </draw:page>
      <draw:page draw:name="Slide33" draw:style-name="a2001" draw:master-page-name="Master2-Layout2-obj-Title-and-Content" presentation:presentation-page-layout-name="Master2-PPL2" draw:id="Slide-288">
        <draw:frame draw:id="id312" presentation:style-name="a2005" draw:name="Slide Number Placeholder 9" svg:x="12.94979in" svg:y="6.98961in" svg:width="0.24792in" svg:height="0.28333in" presentation:class="page-number" presentation:placeholder="false">
          <draw:text-box>
            <text:p text:style-name="a2004" text:class-names="" text:cond-style-name=""><text:span text:style-name="a2002" text:class-names=""><text:page-number style:num-format="1" text:fixed="false"/></text:span><text:span text:style-name="a2003" text:class-names=""/></text:p>
          </draw:text-box>
          <svg:title/>
          <svg:desc/>
        </draw:frame>
        <draw:frame draw:id="id313" draw:style-name="a2009" draw:name="Title 1" svg:x="0.50806in" svg:y="0.15199in" svg:width="11.5in" svg:height="0.80781in">
          <draw:text-box>
            <text:p text:style-name="a2008" text:class-names="" text:cond-style-name=""><text:span text:style-name="a2006" text:class-names="">Solution Description</text:span><text:span text:style-name="a2007" text:class-names=""/></text:p>
          </draw:text-box>
          <svg:title/>
          <svg:desc/>
        </draw:frame>
        <draw:frame draw:id="id314" draw:style-name="a2039" draw:name="Content Placeholder 2" svg:x="0.34677in" svg:y="1.58013in" svg:width="6.26613in" svg:height="4.88404in">
          <draw:text-box>
            <text:list text:style-name="a2017">
              <text:list-item>
                <text:p text:style-name="a2016" text:class-names="" text:cond-style-name=""><text:span text:style-name="a2010" text:class-names="">Diffusion model</text:span><text:span text:style-name="a2011" text:class-names="">: Compute temperature of cell based on neighborhood and<text:s text:c="1"/></text:span><draw:frame draw:style-name="a2012" text:anchor-type="as-char" svg:x="1173.95354in" svg:y="0in" svg:width="0.50083in" svg:height="0.4in" style:rel-width="scale" style:rel-height="scale"><draw:object xlink:href="Object 1/" xlink:type="simple" xlink:show="embed" xlink:actuate="onLoad"/></draw:frame><text:span text:style-name="a2013" text:class-names=""><text:s text:c="1"/>and<text:s text:c="1"/></text:span><draw:frame draw:style-name="a2014" text:anchor-type="as-char" svg:x="1173.95854in" svg:y="0in" svg:width="0.49083in" svg:height="0.43681in" style:rel-width="scale" style:rel-height="scale"><draw:object xlink:href="Object 2/" xlink:type="simple" xlink:show="embed" xlink:actuate="onLoad"/></draw:frame><text:span text:style-name="a2015" text:class-names=""><text:s text:c="1"/>coefficients.</text:span></text:p>
              </text:list-item>
            </text:list>
            <text:list text:style-name="a2020">
              <text:list-item>
                <text:p text:style-name="a2019" text:class-names="" text:cond-style-name=""><text:span text:style-name="a2018" text:class-names=""/></text:p>
              </text:list-item>
            </text:list>
            <text:list text:style-name="a2024">
              <text:list-item>
                <text:p text:style-name="a2023" text:class-names="" text:cond-style-name=""><text:span text:style-name="a2021" text:class-names="">Boundary cells</text:span><text:span text:style-name="a2022" text:class-names="">: handling out-of-bounds memory errors.</text:span></text:p>
              </text:list-item>
            </text:list>
            <text:list text:style-name="a2027">
              <text:list-item>
                <text:p text:style-name="a2026" text:class-names="" text:cond-style-name=""><text:span text:style-name="a2025" text:class-names=""/></text:p>
              </text:list-item>
            </text:list>
            <text:list text:style-name="a2031">
              <text:list-item>
                <text:p text:style-name="a2030" text:class-names="" text:cond-style-name=""><text:span text:style-name="a2028" text:class-names="">Optimization</text:span><text:span text:style-name="a2029" text:class-names="">: swapping input and output matrices.</text:span></text:p>
              </text:list-item>
            </text:list>
            <text:list text:style-name="a2034">
              <text:list-item>
                <text:p text:style-name="a2033" text:class-names="" text:cond-style-name=""><text:span text:style-name="a2032" text:class-names=""/></text:p>
              </text:list-item>
            </text:list>
            <text:list text:style-name="a2038">
              <text:list-item>
                <text:p text:style-name="a2037" text:class-names="" text:cond-style-name=""><text:span text:style-name="a2035" text:class-names="">Parallelization:<text:s text:c="1"/></text:span><text:span text:style-name="a2036" text:class-names="">static scheduling.</text:span></text:p>
              </text:list-item>
            </text:list>
          </draw:text-box>
          <svg:title/>
          <svg:desc/>
        </draw:frame>
        <draw:frame draw:id="id315" draw:style-name="a2044" draw:name="Title 1" svg:x="0.50806in" svg:y="0.78471in" svg:width="11.5in" svg:height="0.40391in">
          <draw:text-box>
            <text:p text:style-name="a2043" text:class-names="" text:cond-style-name=""><text:span text:style-name="a2040" text:class-names="">Core<text:s text:c="1"/></text:span><text:span text:style-name="a2041" text:class-names="">alghoritm</text:span><text:span text:style-name="a2042" text:class-names=""/></text:p>
          </draw:text-box>
          <svg:title/>
          <svg:desc/>
        </draw:frame>
        <draw:frame draw:id="id316" draw:style-name="a2045" draw:name="Picture 5" svg:x="6.74593in" svg:y="1.76762in" svg:width="6.51213in" svg:height="3.55496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37" draw:style-name="a2046" draw:master-page-name="Master2-Layout2-obj-Title-and-Content" presentation:presentation-page-layout-name="Master2-PPL2" draw:id="Slide-292">
        <draw:frame draw:id="id317" presentation:style-name="a2050" draw:name="Slide Number Placeholder 9" svg:x="12.94979in" svg:y="6.98961in" svg:width="0.24792in" svg:height="0.28333in" presentation:class="page-number" presentation:placeholder="false">
          <draw:text-box>
            <text:p text:style-name="a2049" text:class-names="" text:cond-style-name=""><text:span text:style-name="a2047" text:class-names=""><text:page-number style:num-format="1" text:fixed="false"/></text:span><text:span text:style-name="a2048" text:class-names=""/></text:p>
          </draw:text-box>
          <svg:title/>
          <svg:desc/>
        </draw:frame>
        <draw:frame draw:id="id318" draw:style-name="a2054" draw:name="Title 1" svg:x="0.50806in" svg:y="0.15199in" svg:width="11.5in" svg:height="0.80781in">
          <draw:text-box>
            <text:p text:style-name="a2053" text:class-names="" text:cond-style-name=""><text:span text:style-name="a2051" text:class-names="">Solution Description</text:span><text:span text:style-name="a2052" text:class-names=""/></text:p>
          </draw:text-box>
          <svg:title/>
          <svg:desc/>
        </draw:frame>
        <draw:frame draw:id="id319" draw:style-name="a2098" draw:name="Content Placeholder 2" svg:x="0.50806in" svg:y="1.62949in" svg:width="11.5in" svg:height="5.25078in">
          <draw:text-box>
            <text:list text:style-name="a2062">
              <text:list-item>
                <text:p text:style-name="a2061" text:class-names="" text:cond-style-name=""><text:span text:style-name="a2055" text:class-names="">Convergence</text:span><text:span text:style-name="a2056" text:class-names="">:<text:s text:c="1"/></text:span><text:span text:style-name="a2057" text:class-names="">checking if the maximum temperature change in an iteration is higher then set<text:s text:c="1"/></text:span><text:span text:style-name="a2058" text:class-names="">threshold</text:span><text:span text:style-name="a2059" text:class-names=""><text:s text:c="1"/>(0.001ºC)</text:span><text:span text:style-name="a2060" text:class-names="">.</text:span></text:p>
              </text:list-item>
            </text:list>
            <text:list text:style-name="a2065">
              <text:list-item>
                <text:p text:style-name="a2064" text:class-names="" text:cond-style-name=""><text:span text:style-name="a2063" text:class-names=""/></text:p>
              </text:list-item>
            </text:list>
            <text:list text:style-name="a2072">
              <text:list-item>
                <text:p text:style-name="a2071" text:class-names="" text:cond-style-name=""><text:span text:style-name="a2066" text:class-names="">S</text:span><text:span text:style-name="a2067" text:class-names="">imulation</text:span><text:span text:style-name="a2068" text:class-names=""><text:s text:c="1"/>executed with different<text:s text:c="1"/></text:span><text:span text:style-name="a2069" text:class-names="">number of thread</text:span><text:span text:style-name="a2070" text:class-names="">s (1,2,4,8,16,32).</text:span></text:p>
              </text:list-item>
            </text:list>
            <text:list text:style-name="a2075">
              <text:list-item>
                <text:p text:style-name="a2074" text:class-names="" text:cond-style-name=""><text:span text:style-name="a2073" text:class-names=""/></text:p>
              </text:list-item>
            </text:list>
            <text:list text:style-name="a2083">
              <text:list-item>
                <text:p text:style-name="a2082" text:class-names="" text:cond-style-name=""><text:span text:style-name="a2076" text:class-names="">Performance Tracking</text:span><text:span text:style-name="a2077" text:class-names="">: execution time<text:s text:c="1"/></text:span><text:span text:style-name="a2078" text:class-names="">measured with<text:s text:c="1"/></text:span><text:span text:style-name="a2079" text:class-names="">omp_get_wtime</text:span><text:span text:style-name="a2080" text:class-names="">() to analyze</text:span><text:span text:style-name="a2081" text:class-names=""><text:s text:c="1"/>parallel speedup.</text:span></text:p>
              </text:list-item>
            </text:list>
            <text:list text:style-name="a2086">
              <text:list-item>
                <text:p text:style-name="a2085" text:class-names="" text:cond-style-name=""><text:span text:style-name="a2084" text:class-names=""/></text:p>
              </text:list-item>
            </text:list>
            <text:list text:style-name="a2091">
              <text:list-item>
                <text:p text:style-name="a2090" text:class-names="" text:cond-style-name=""><text:span text:style-name="a2087" text:class-names="">Snapshots:<text:s text:c="1"/></text:span><text:span text:style-name="a2088" text:class-names="">images taken in a separate simulation to not affect the performance.</text:span><text:span text:style-name="a2089" text:class-names=""/></text:p>
              </text:list-item>
            </text:list>
            <text:list text:style-name="a2094">
              <text:list-item>
                <text:p text:style-name="a2093" text:class-names="" text:cond-style-name=""><text:span text:style-name="a2092" text:class-names=""/></text:p>
              </text:list-item>
            </text:list>
            <text:list text:style-name="a2097">
              <text:list-item>
                <text:p text:style-name="a2096" text:class-names="" text:cond-style-name=""><text:span text:style-name="a2095" text:class-names=""/></text:p>
              </text:list-item>
            </text:list>
          </draw:text-box>
          <svg:title/>
          <svg:desc/>
        </draw:frame>
        <draw:frame draw:id="id320" draw:style-name="a2101" draw:name="Title 1" svg:x="0.50806in" svg:y="0.95981in" svg:width="11.5in" svg:height="0.40391in">
          <draw:text-box>
            <text:p text:style-name="a2100" text:class-names="" text:cond-style-name=""><text:span text:style-name="a2099" text:class-names="">Convergence &amp; Scalability Testing</text:span></text:p>
          </draw:text-box>
          <svg:title/>
          <svg:desc/>
        </draw:frame>
      </draw:page>
      <draw:page draw:name="Slide38" draw:style-name="a2102" draw:master-page-name="Master2-Layout2-obj-Title-and-Content" presentation:presentation-page-layout-name="Master2-PPL2" draw:id="Slide-293">
        <draw:frame draw:id="id321" presentation:style-name="a2106" draw:name="Slide Number Placeholder 9" svg:x="12.94979in" svg:y="7.06488in" svg:width="0.24792in" svg:height="0.28333in" presentation:class="page-number" presentation:placeholder="false">
          <draw:text-box>
            <text:p text:style-name="a2105" text:class-names="" text:cond-style-name=""><text:span text:style-name="a2103" text:class-names=""><text:page-number style:num-format="1" text:fixed="false"/></text:span><text:span text:style-name="a2104" text:class-names=""/></text:p>
          </draw:text-box>
          <svg:title/>
          <svg:desc/>
        </draw:frame>
        <draw:frame draw:id="id322" draw:style-name="a2110" draw:name="Title 1" svg:x="0.50806in" svg:y="0.15199in" svg:width="11.5in" svg:height="0.80781in">
          <draw:text-box>
            <text:p text:style-name="a2109" text:class-names="" text:cond-style-name=""><text:span text:style-name="a2107" text:class-names="">Experimental Results</text:span><text:span text:style-name="a2108" text:class-names=""/></text:p>
          </draw:text-box>
          <svg:title/>
          <svg:desc/>
        </draw:frame>
        <draw:frame draw:id="id323" draw:style-name="a2113" draw:name="Title 1" svg:x="0.50806in" svg:y="1.27463in" svg:width="5.37366in" svg:height="0.33659in">
          <draw:text-box>
            <text:p text:style-name="a2112" text:class-names="" text:cond-style-name=""><text:span text:style-name="a2111" text:class-names="">Simulation 1</text:span></text:p>
          </draw:text-box>
          <svg:title/>
          <svg:desc/>
        </draw:frame>
        <draw:frame draw:id="id324" draw:style-name="a2116" draw:name="Title 1" svg:x="6.9791in" svg:y="1.27463in" svg:width="5.37366in" svg:height="0.33659in">
          <draw:text-box>
            <text:p text:style-name="a2115" text:class-names="" text:cond-style-name=""><text:span text:style-name="a2114" text:class-names="">Simulation 2</text:span></text:p>
          </draw:text-box>
          <svg:title/>
          <svg:desc/>
        </draw:frame>
        <draw:frame draw:id="id325" draw:style-name="a2117" draw:name="Picture 3" svg:x="0.50806in" svg:y="2.23448in" svg:width="3.43757in" svg:height="3.43757in" style:rel-width="scale" style:rel-height="scale">
          <draw:image xlink:href="media/image16.gif" xlink:type="simple" xlink:show="embed" xlink:actuate="onLoad"/>
          <svg:title/>
          <svg:desc/>
        </draw:frame>
        <draw:frame draw:id="id326" draw:style-name="a2118" draw:name="Picture 21" svg:x="7.00463in" svg:y="2.23448in" svg:width="3.41204in" svg:height="3.43757in" style:rel-width="scale" style:rel-height="scale">
          <draw:image xlink:href="media/image17.gif" xlink:type="simple" xlink:show="embed" xlink:actuate="onLoad"/>
          <svg:title/>
          <svg:desc/>
        </draw:frame>
      </draw:page>
      <draw:page draw:name="Slide34" draw:style-name="a2119" draw:master-page-name="Master2-Layout2-obj-Title-and-Content" presentation:presentation-page-layout-name="Master2-PPL2" draw:id="Slide-289">
        <draw:frame draw:id="id327" presentation:style-name="a2123" draw:name="Slide Number Placeholder 9" svg:x="12.94979in" svg:y="7.06488in" svg:width="0.24792in" svg:height="0.28333in" presentation:class="page-number" presentation:placeholder="false">
          <draw:text-box>
            <text:p text:style-name="a2122" text:class-names="" text:cond-style-name=""><text:span text:style-name="a2120" text:class-names=""><text:page-number style:num-format="1" text:fixed="false"/></text:span><text:span text:style-name="a2121" text:class-names=""/></text:p>
          </draw:text-box>
          <svg:title/>
          <svg:desc/>
        </draw:frame>
        <draw:frame draw:id="id328" draw:style-name="a2127" draw:name="Title 1" svg:x="0.50806in" svg:y="0.15199in" svg:width="11.5in" svg:height="0.80781in">
          <draw:text-box>
            <text:p text:style-name="a2126" text:class-names="" text:cond-style-name=""><text:span text:style-name="a2124" text:class-names="">Experimental Results</text:span><text:span text:style-name="a2125" text:class-names=""/></text:p>
          </draw:text-box>
          <svg:title/>
          <svg:desc/>
        </draw:frame>
        <draw:frame draw:id="id329" draw:style-name="a2128" draw:name="Picture 4" svg:x="0.08559in" svg:y="1.61122in" svg:width="6.21861in" svg:height="4.83669in" style:rel-width="scale" style:rel-height="scale">
          <draw:image xlink:href="media/image18.png" xlink:type="simple" xlink:show="embed" xlink:actuate="onLoad"/>
          <svg:title/>
          <svg:desc/>
        </draw:frame>
        <draw:frame draw:id="id330" draw:style-name="a2129" draw:name="Picture 6" svg:x="6.9791in" svg:y="1.61122in" svg:width="6.21861in" svg:height="4.83669in" style:rel-width="scale" style:rel-height="scale">
          <draw:image xlink:href="media/image19.png" xlink:type="simple" xlink:show="embed" xlink:actuate="onLoad"/>
          <svg:title/>
          <svg:desc/>
        </draw:frame>
        <draw:frame draw:id="id331" draw:style-name="a2132" draw:name="Title 1" svg:x="0.50806in" svg:y="1.27463in" svg:width="5.37366in" svg:height="0.33659in">
          <draw:text-box>
            <text:p text:style-name="a2131" text:class-names="" text:cond-style-name=""><text:span text:style-name="a2130" text:class-names="">Simulation 1</text:span></text:p>
          </draw:text-box>
          <svg:title/>
          <svg:desc/>
        </draw:frame>
        <draw:frame draw:id="id332" draw:style-name="a2135" draw:name="Title 1" svg:x="6.9791in" svg:y="1.27463in" svg:width="5.37366in" svg:height="0.33659in">
          <draw:text-box>
            <text:p text:style-name="a2134" text:class-names="" text:cond-style-name=""><text:span text:style-name="a2133" text:class-names="">Simulation 2</text:span></text:p>
          </draw:text-box>
          <svg:title/>
          <svg:desc/>
        </draw:frame>
      </draw:page>
      <draw:page draw:name="Slide35" draw:style-name="a2136" draw:master-page-name="Master2-Layout2-obj-Title-and-Content" presentation:presentation-page-layout-name="Master2-PPL2" draw:id="Slide-290">
        <draw:frame draw:id="id333" presentation:style-name="a2140" draw:name="Slide Number Placeholder 9" svg:x="12.94979in" svg:y="6.98961in" svg:width="0.24792in" svg:height="0.28333in" presentation:class="page-number" presentation:placeholder="false">
          <draw:text-box>
            <text:p text:style-name="a2139" text:class-names="" text:cond-style-name=""><text:span text:style-name="a2137" text:class-names=""><text:page-number style:num-format="1" text:fixed="false"/></text:span><text:span text:style-name="a2138" text:class-names=""/></text:p>
          </draw:text-box>
          <svg:title/>
          <svg:desc/>
        </draw:frame>
        <draw:frame draw:id="id334" draw:style-name="a2144" draw:name="Title 1" svg:x="0.50806in" svg:y="0.15199in" svg:width="11.5in" svg:height="0.80781in">
          <draw:text-box>
            <text:p text:style-name="a2143" text:class-names="" text:cond-style-name=""><text:span text:style-name="a2141" text:class-names="">Conclusions</text:span><text:span text:style-name="a2142" text:class-names=""/></text:p>
          </draw:text-box>
          <svg:title/>
          <svg:desc/>
        </draw:frame>
        <draw:frame draw:id="id335" draw:style-name="a2165" draw:name="Content Placeholder 2" svg:x="0.50806in" svg:y="1.70174in" svg:width="11.5in" svg:height="3.76979in">
          <draw:text-box>
            <text:list text:style-name="a2148">
              <text:list-item>
                <text:p text:style-name="a2147" text:class-names="" text:cond-style-name=""><text:span text:style-name="a2145" text:class-names="">Optimal Scaling</text:span><text:span text:style-name="a2146" text:class-names="">: performance gains from parallelization, achieving maximum speedup at 4/8 threads.</text:span></text:p>
              </text:list-item>
            </text:list>
            <text:list text:style-name="a2151">
              <text:list-item>
                <text:p text:style-name="a2150" text:class-names="" text:cond-style-name=""><text:span text:style-name="a2149" text:class-names=""/></text:p>
              </text:list-item>
            </text:list>
            <text:list text:style-name="a2154">
              <text:list-item>
                <text:p text:style-name="a2153" text:class-names="" text:cond-style-name=""><text:span text:style-name="a2152" text:class-names="">Hardware Alignment: Improvement of performance.</text:span></text:p>
              </text:list-item>
            </text:list>
            <text:list text:style-name="a2157">
              <text:list-item>
                <text:p text:style-name="a2156" text:class-names="" text:cond-style-name=""><text:span text:style-name="a2155" text:class-names=""/></text:p>
              </text:list-item>
            </text:list>
            <text:list text:style-name="a2164">
              <text:list-item>
                <text:p text:style-name="a2163" text:class-names="" text:cond-style-name=""><text:span text:style-name="a2158" text:class-names="">Resource Contention: Allocating threads beyond the physical core limit introduces<text:s text:c="1"/></text:span><text:span text:style-name="a2159" text:class-names="">context-switching</text:span><text:span text:style-name="a2160" text:class-names=""><text:s text:c="1"/>overhead and<text:s text:c="1"/></text:span><text:span text:style-name="a2161" text:class-names="">hardware competition</text:span><text:span text:style-name="a2162" text:class-names="">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Title Slide">
      <presentation:placeholder presentation:object="title" svg:x="1in" svg:y="2.325in" svg:width="11.33333in" svg:height="1.575in"/>
      <presentation:placeholder presentation:object="subtitle" svg:x="2in" svg:y="4.2in" svg:width="9.33333in" svg:height="1.875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12.94979in" svg:y="6.98961in" svg:width="0.24792in" svg:height="0.28333in"/>
    </style:presentation-page-layout>
    <style:presentation-page-layout style:name="Master2-PPL2" style:display-name="Title and Content">
      <presentation:placeholder presentation:object="title" svg:x="0.36871in" svg:y="0.14907in" svg:width="12.59591in" svg:height="0.69444in"/>
      <presentation:placeholder presentation:object="outline" svg:x="0.3832in" svg:y="1.63777in" svg:width="11.61597in" svg:height="4.22778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12.94979in" svg:y="6.98961in" svg:width="0.24792in" svg:height="0.28333in"/>
    </style:presentation-page-layout>
    <style:presentation-page-layout style:name="Master2-PPL3" style:display-name="Two Content">
      <presentation:placeholder presentation:object="title" svg:x="0.36871in" svg:y="0.14907in" svg:width="12.59591in" svg:height="0.69444in"/>
      <presentation:placeholder presentation:object="object" svg:x="0.66667in" svg:y="1.725in" svg:width="5.8in" svg:height="4.95in"/>
      <presentation:placeholder presentation:object="object" svg:x="6.86667in" svg:y="1.725in" svg:width="5.8in" svg:height="4.95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12.94979in" svg:y="6.98961in" svg:width="0.24792in" svg:height="0.28333in"/>
    </style:presentation-page-layout>
    <style:presentation-page-layout style:name="Master2-PPL4" style:display-name="Title Only">
      <presentation:placeholder presentation:object="title" svg:x="0.36871in" svg:y="0.14907in" svg:width="12.59591in" svg:height="0.69444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12.94979in" svg:y="6.98961in" svg:width="0.24792in" svg:height="0.28333in"/>
    </style:presentation-page-layout>
    <style:presentation-page-layout style:name="Master2-PPL5" style:display-name="Blank"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12.94979in" svg:y="6.98961in" svg:width="0.24792in" svg:height="0.28333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draw:fill-image draw:name="a1121" xlink:href="media/image20.svg" xlink:show="embed" xlink:actuate="onLoad"/>
    <draw:fill-image draw:name="a1134" xlink:href="media/image21.png" xlink:show="embed" xlink:actuate="onLoad"/>
    <draw:fill-image draw:name="a1129" xlink:href="media/image22.png" xlink:show="embed" xlink:actuate="onLoad"/>
    <draw:fill-image draw:name="a1913" xlink:href="media/image21.png" xlink:show="embed" xlink:actuate="onLoad"/>
    <draw:fill-image draw:name="a1144" xlink:href="media/image23.svg" xlink:show="embed" xlink:actuate="onLoad"/>
    <draw:fill-image draw:name="a1152" xlink:href="media/image22.png" xlink:show="embed" xlink:actuate="onLoad"/>
    <draw:fill-image draw:name="a1923" xlink:href="media/image23.svg" xlink:show="embed" xlink:actuate="onLoad"/>
    <draw:fill-image draw:name="a1668" xlink:href="media/image21.png" xlink:show="embed" xlink:actuate="onLoad"/>
    <draw:fill-image draw:name="a1931" xlink:href="media/image22.png" xlink:show="embed" xlink:actuate="onLoad"/>
    <draw:fill-image draw:name="a1678" xlink:href="media/image23.svg" xlink:show="embed" xlink:actuate="onLoad"/>
    <draw:fill-image draw:name="a1686" xlink:href="media/image22.png" xlink:show="embed" xlink:actuate="onLoad"/>
    <draw:fill-image draw:name="a1107" xlink:href="media/image2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002b4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0" style:parent-style-name="Graphics">
      <style:graphic-properties draw:fill="none" draw:stroke="non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18056in" style:font-size-asian="0.18056in" style:font-size-complex="0.18056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.01389in" fo:margin-right="0in" fo:text-indent="0in" fo:margin-top="0.0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2b49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ee7a00" style:text-line-through-type="none" style:text-line-through-style="none" style:text-line-through-width="auto" style:text-line-through-color="font-color" style:text-position="0% 100%" fo:font-family="Lucida Sans Unicode" style:font-family-complex="Lucida Sans Unicod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  <style:master-page style:name="Master2-1_Office-Theme" style:page-layout-name="pageLayout1" draw:style-name="a776">
      <draw:custom-shape svg:x="0in" svg:y="6.89931in" svg:width="13.33333in" svg:height="0.60069in" draw:id="id69" draw:style-name="a779" draw:name="bg object 16">
        <svg:title/>
        <svg:desc/>
        <text:p text:style-name="a778" text:class-names="" text:cond-style-name=""><text:span text:style-name="a777" text:class-names=""/></text:p>
        <draw:enhanced-geometry xmlns:dr3d="urn:oasis:names:tc:opendocument:xmlns:dr3d:1.0" draw:type="non-primitive" svg:viewBox="0 0 12192000 549275" draw:enhanced-path="M 12191999 549274 L 0 549274 0 0 12191999 0 12191999 549274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5492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70" draw:style-name="a780" draw:name="bg object 17" svg:x="0.30874in" svg:y="7.07044in" svg:width="1.0401in" svg:height="0.29486in" style:rel-width="scale" style:rel-height="scale">
        <draw:image xlink:href="media/image24.png" xlink:type="simple" xlink:show="embed" xlink:actuate="onLoad"/>
        <svg:title/>
        <svg:desc/>
      </draw:frame>
      <draw:frame draw:id="id71" presentation:style-name="a783" draw:name="Holder 2" svg:x="0.36871in" svg:y="0.14907in" svg:width="12.59591in" svg:height="0.69444in" presentation:class="title" presentation:placeholder="false">
        <draw:text-box>
          <text:p text:style-name="a782" text:class-names="" text:cond-style-name=""><text:span text:style-name="a781" text:class-names=""/></text:p>
        </draw:text-box>
        <svg:title/>
        <svg:desc/>
      </draw:frame>
      <draw:frame draw:id="id72" presentation:style-name="a787" draw:name="Holder 3" svg:x="0.3832in" svg:y="1.63777in" svg:width="11.61597in" svg:height="4.22778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/></text:p>
            </text:list-item>
          </text:list>
        </draw:text-box>
        <svg:title/>
        <svg:desc/>
      </draw:frame>
      <draw:frame draw:id="id73" presentation:style-name="a790" draw:name="Holder 4" svg:x="4.53333in" svg:y="6.975in" svg:width="4.26667in" svg:height="0.375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74" presentation:style-name="a795" draw:name="Holder 5" svg:x="0.66667in" svg:y="6.975in" svg:width="3.06667in" svg:height="0.375in" presentation:class="date-time" presentation:placeholder="false">
        <draw:text-box>
          <text:p text:style-name="a794" text:class-names="" text:cond-style-name=""><text:span text:style-name="a791" text:class-names=""><text:date text:fixed="false" style:data-style-name="a792"/></text:span><text:span text:style-name="a793" text:class-names=""/></text:p>
        </draw:text-box>
        <svg:title/>
        <svg:desc/>
      </draw:frame>
      <draw:frame draw:id="id75" presentation:style-name="a799" draw:name="Holder 6" svg:x="12.94979in" svg:y="6.98961in" svg:width="0.24792in" svg:height="0.28333in" presentation:class="page-number" presentation:placeholder="false">
        <draw:text-box>
          <text:p text:style-name="a798" text:class-names="" text:cond-style-name=""><text:span text:style-name="a796" text:class-names=""><text:page-number style:num-format="1" text:fixed="false"/></text:span><text:span text:style-name="a797" text:class-names=""/></text:p>
        </draw:text-box>
        <svg:title/>
        <svg:desc/>
      </draw:frame>
      <presentation:notes style:page-layout-name="pageLayout2" draw:style-name="a832">
        <draw:frame draw:id="id5" presentation:style-name="a802" draw:name="Header Placeholder 1" svg:x="0in" svg:y="0in" svg:width="3.25in" svg:height="0.50174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6" presentation:style-name="a807" draw:name="Date Placeholder 2" svg:x="4.24826in" svg:y="0in" svg:width="3.25in" svg:height="0.50174in" presentation:class="date-time" presentation:placeholder="false">
          <draw:text-box>
            <text:p text:style-name="a806" text:class-names="" text:cond-style-name=""><text:span text:style-name="a803" text:class-names=""><text:date text:fixed="false" style:data-style-name="a804"/></text:span><text:span text:style-name="a80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08" draw:name="Slide Image Placeholder 3">
          <svg:title/>
          <svg:desc/>
        </draw:page-thumbnail>
        <draw:frame draw:id="id8" presentation:style-name="a824" draw:name="Notes Placeholder 4" svg:x="0.75in" svg:y="4.8125in" svg:width="6in" svg:height="3.9375in" presentation:class="notes" presentation:placeholder="false">
          <draw:text-box>
            <text:p text:style-name="a810" text:class-names="" text:cond-style-name=""><text:span text:style-name="a809" text:class-names="">Click to edit Master text styles</text:span></text:p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>Second level</text:span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p text:style-name="a815" text:class-names="" text:cond-style-name=""><text:span text:style-name="a8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list text:style-name="a819">
                          <text:list-item>
                            <text:p text:style-name="a818" text:class-names="" text:cond-style-name=""><text:span text:style-name="a8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list text:style-name="a823">
                      <text:list-item>
                        <text:list text:style-name="a823">
                          <text:list-item>
                            <text:list text:style-name="a823">
                              <text:list-item>
                                <text:p text:style-name="a822" text:class-names="" text:cond-style-name=""><text:span text:style-name="a820" text:class-names="">Fifth level</text:span><text:span text:style-name="a8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27" draw:name="Footer Placeholder 5" svg:x="0in" svg:y="9.49826in" svg:width="3.25in" svg:height="0.50174in" presentation:class="foot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1" draw:name="Slide Number Placeholder 6" svg:x="4.24826in" svg:y="9.49826in" svg:width="3.25in" svg:height="0.50174in" presentation:class="page-number" presentation:placeholder="false">
          <draw:text-box>
            <text:p text:style-name="a830" text:class-names="" text:cond-style-name=""><text:span text:style-name="a828" text:class-names=""><text:page-number style:num-format="1" text:fixed="false"/></text:span><text:span text:style-name="a829" text:class-names=""/></text:p>
          </draw:text-box>
          <svg:title/>
          <svg:desc/>
        </draw:frame>
      </presentation:notes>
    </style:master-page>
    <style:master-page style:name="Master2-Layout1-obj-Title-Slide" style:page-layout-name="pageLayout1" draw:style-name="a833">
      <draw:frame draw:id="id76" draw:layer="Master2-bg" presentation:style-name="a836" draw:name="Holder 2" svg:x="1in" svg:y="2.325in" svg:width="11.33333in" svg:height="1.575in" presentation:class="titl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77" draw:layer="Master2-bg" presentation:style-name="a839" draw:name="Holder 3" svg:x="2in" svg:y="4.2in" svg:width="9.33333in" svg:height="1.875in" presentation:class="subtitle" presentation:placeholder="false">
        <draw:text-box>
          <text:p text:style-name="a838" text:class-names="" text:cond-style-name=""><text:span text:style-name="a837" text:class-names=""/></text:p>
        </draw:text-box>
        <svg:title/>
        <svg:desc/>
      </draw:frame>
      <draw:frame draw:id="id78" presentation:style-name="a842" draw:name="Holder 4" svg:x="4.53333in" svg:y="6.975in" svg:width="4.26667in" svg:height="0.375in" presentation:class="footer" presentation:placeholder="false">
        <draw:text-box>
          <text:p text:style-name="a841" text:class-names="" text:cond-style-name=""><text:span text:style-name="a840" text:class-names=""/></text:p>
        </draw:text-box>
        <svg:title/>
        <svg:desc/>
      </draw:frame>
      <draw:frame draw:id="id79" presentation:style-name="a847" draw:name="Holder 5" svg:x="0.66667in" svg:y="6.975in" svg:width="3.06667in" svg:height="0.375in" presentation:class="date-time" presentation:placeholder="false">
        <draw:text-box>
          <text:p text:style-name="a846" text:class-names="" text:cond-style-name=""><text:span text:style-name="a843" text:class-names=""><text:date text:fixed="false" style:data-style-name="a844"/></text:span><text:span text:style-name="a845" text:class-names=""/></text:p>
        </draw:text-box>
        <svg:title/>
        <svg:desc/>
      </draw:frame>
      <draw:frame draw:id="id80" presentation:style-name="a851" draw:name="Holder 6" svg:x="12.94979in" svg:y="6.98961in" svg:width="0.24792in" svg:height="0.28333in" presentation:class="page-number" presentation:placeholder="false">
        <draw:text-box>
          <text:p text:style-name="a850" text:class-names="" text:cond-style-name=""><text:span text:style-name="a848" text:class-names=""><text:page-number style:num-format="1" text:fixed="false"/></text:span><text:span text:style-name="a849" text:class-names=""/></text:p>
        </draw:text-box>
        <svg:title/>
        <svg:desc/>
      </draw:frame>
      <presentation:notes style:page-layout-name="pageLayout2" draw:style-name="a884">
        <draw:frame draw:id="id5" presentation:style-name="a854" draw:name="Header Placeholder 1" svg:x="0in" svg:y="0in" svg:width="3.25in" svg:height="0.50174in" presentation:class="header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6" presentation:style-name="a859" draw:name="Date Placeholder 2" svg:x="4.24826in" svg:y="0in" svg:width="3.25in" svg:height="0.50174in" presentation:class="date-time" presentation:placeholder="false">
          <draw:text-box>
            <text:p text:style-name="a858" text:class-names="" text:cond-style-name=""><text:span text:style-name="a855" text:class-names=""><text:date text:fixed="false" style:data-style-name="a856"/></text:span><text:span text:style-name="a8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60" draw:name="Slide Image Placeholder 3">
          <svg:title/>
          <svg:desc/>
        </draw:page-thumbnail>
        <draw:frame draw:id="id8" presentation:style-name="a876" draw:name="Notes Placeholder 4" svg:x="0.75in" svg:y="4.8125in" svg:width="6in" svg:height="3.9375in" presentation:class="notes" presentation:placeholder="false">
          <draw:text-box>
            <text:p text:style-name="a862" text:class-names="" text:cond-style-name=""><text:span text:style-name="a861" text:class-names="">Click to edit Master text styles</text:span></text:p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3" text:class-names="">Second level</text:span></text:p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p text:style-name="a867" text:class-names="" text:cond-style-name=""><text:span text:style-name="a8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list text:style-name="a871">
                          <text:list-item>
                            <text:p text:style-name="a870" text:class-names="" text:cond-style-name=""><text:span text:style-name="a8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list text:style-name="a875">
                      <text:list-item>
                        <text:list text:style-name="a875">
                          <text:list-item>
                            <text:list text:style-name="a875">
                              <text:list-item>
                                <text:p text:style-name="a874" text:class-names="" text:cond-style-name=""><text:span text:style-name="a872" text:class-names="">Fifth level</text:span><text:span text:style-name="a8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79" draw:name="Footer Placeholder 5" svg:x="0in" svg:y="9.49826in" svg:width="3.25in" svg:height="0.50174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3" draw:name="Slide Number Placeholder 6" svg:x="4.24826in" svg:y="9.49826in" svg:width="3.25in" svg:height="0.50174in" presentation:class="page-number" presentation:placeholder="false">
          <draw:text-box>
            <text:p text:style-name="a882" text:class-names="" text:cond-style-name=""><text:span text:style-name="a880" text:class-names=""><text:page-number style:num-format="1" text:fixed="false"/></text:span><text:span text:style-name="a881" text:class-names=""/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885">
      <draw:frame draw:id="id81" draw:layer="Master2-bg" presentation:style-name="a888" draw:name="Holder 2" svg:x="0.36871in" svg:y="0.14907in" svg:width="12.59591in" svg:height="0.69444in" presentation:class="title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82" draw:layer="Master2-bg" presentation:style-name="a892" draw:name="Holder 3" svg:x="0.3832in" svg:y="1.63777in" svg:width="11.61597in" svg:height="4.22778in" presentation:class="outline" presentation:placeholder="false">
        <draw:text-box>
          <text:list text:style-name="a891">
            <text:list-item>
              <text:p text:style-name="a890" text:class-names="" text:cond-style-name=""><text:span text:style-name="a889" text:class-names=""/></text:p>
            </text:list-item>
          </text:list>
        </draw:text-box>
        <svg:title/>
        <svg:desc/>
      </draw:frame>
      <draw:frame draw:id="id83" presentation:style-name="a895" draw:name="Holder 4" svg:x="4.53333in" svg:y="6.975in" svg:width="4.26667in" svg:height="0.375in" presentation:class="footer" presentation:placeholder="false">
        <draw:text-box>
          <text:p text:style-name="a894" text:class-names="" text:cond-style-name=""><text:span text:style-name="a893" text:class-names=""/></text:p>
        </draw:text-box>
        <svg:title/>
        <svg:desc/>
      </draw:frame>
      <draw:frame draw:id="id84" presentation:style-name="a900" draw:name="Holder 5" svg:x="0.66667in" svg:y="6.975in" svg:width="3.06667in" svg:height="0.375in" presentation:class="date-time" presentation:placeholder="false">
        <draw:text-box>
          <text:p text:style-name="a899" text:class-names="" text:cond-style-name=""><text:span text:style-name="a896" text:class-names=""><text:date text:fixed="false" style:data-style-name="a897"/></text:span><text:span text:style-name="a898" text:class-names=""/></text:p>
        </draw:text-box>
        <svg:title/>
        <svg:desc/>
      </draw:frame>
      <draw:frame draw:id="id85" presentation:style-name="a904" draw:name="Holder 6" svg:x="12.94979in" svg:y="6.98961in" svg:width="0.24792in" svg:height="0.28333in" presentation:class="page-number" presentation:placeholder="false">
        <draw:text-box>
          <text:p text:style-name="a903" text:class-names="" text:cond-style-name=""><text:span text:style-name="a901" text:class-names=""><text:page-number style:num-format="1" text:fixed="false"/></text:span><text:span text:style-name="a902" text:class-names=""/></text:p>
        </draw:text-box>
        <svg:title/>
        <svg:desc/>
      </draw:frame>
      <presentation:notes style:page-layout-name="pageLayout2" draw:style-name="a937">
        <draw:frame draw:id="id5" presentation:style-name="a907" draw:name="Header Placeholder 1" svg:x="0in" svg:y="0in" svg:width="3.25in" svg:height="0.50174in" presentation:class="head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6" presentation:style-name="a912" draw:name="Date Placeholder 2" svg:x="4.24826in" svg:y="0in" svg:width="3.25in" svg:height="0.50174in" presentation:class="date-time" presentation:placeholder="false">
          <draw:text-box>
            <text:p text:style-name="a911" text:class-names="" text:cond-style-name=""><text:span text:style-name="a908" text:class-names=""><text:date text:fixed="false" style:data-style-name="a909"/></text:span><text:span text:style-name="a91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3" draw:name="Slide Image Placeholder 3">
          <svg:title/>
          <svg:desc/>
        </draw:page-thumbnail>
        <draw:frame draw:id="id8" presentation:style-name="a929" draw:name="Notes Placeholder 4" svg:x="0.75in" svg:y="4.8125in" svg:width="6in" svg:height="3.9375in" presentation:class="notes" presentation:placeholder="false">
          <draw:text-box>
            <text:p text:style-name="a915" text:class-names="" text:cond-style-name=""><text:span text:style-name="a914" text:class-names="">Click to edit Master text styles</text:span></text:p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Second level</text:span></text:p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list text:style-name="a921">
                      <text:list-item>
                        <text:p text:style-name="a920" text:class-names="" text:cond-style-name=""><text:span text:style-name="a9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list text:style-name="a924">
                          <text:list-item>
                            <text:p text:style-name="a923" text:class-names="" text:cond-style-name=""><text:span text:style-name="a9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list text:style-name="a928">
                          <text:list-item>
                            <text:list text:style-name="a928">
                              <text:list-item>
                                <text:p text:style-name="a927" text:class-names="" text:cond-style-name=""><text:span text:style-name="a925" text:class-names="">Fifth level</text:span><text:span text:style-name="a9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2" draw:name="Footer Placeholder 5" svg:x="0in" svg:y="9.49826in" svg:width="3.25in" svg:height="0.50174in" presentation:class="footer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10" presentation:style-name="a936" draw:name="Slide Number Placeholder 6" svg:x="4.24826in" svg:y="9.49826in" svg:width="3.25in" svg:height="0.50174in" presentation:class="page-number" presentation:placeholder="false">
          <draw:text-box>
            <text:p text:style-name="a935" text:class-names="" text:cond-style-name=""><text:span text:style-name="a933" text:class-names=""><text:page-number style:num-format="1" text:fixed="false"/></text:span><text:span text:style-name="a934" text:class-names=""/></text:p>
          </draw:text-box>
          <svg:title/>
          <svg:desc/>
        </draw:frame>
      </presentation:notes>
    </style:master-page>
    <style:master-page style:name="Master2-Layout3-obj-Two-Content" style:page-layout-name="pageLayout1" draw:style-name="a938">
      <draw:frame draw:id="id86" draw:layer="Master2-bg" presentation:style-name="a941" draw:name="Holder 2" svg:x="0.36871in" svg:y="0.14907in" svg:width="12.59591in" svg:height="0.69444in" presentation:class="title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87" draw:layer="Master2-bg" presentation:style-name="a944" draw:name="Holder 3" svg:x="0.66667in" svg:y="1.725in" svg:width="5.8in" svg:height="4.95in" presentation:class="object" presentation:placeholder="false">
        <draw:text-box>
          <text:p text:style-name="a943" text:class-names="" text:cond-style-name=""><text:span text:style-name="a942" text:class-names=""/></text:p>
        </draw:text-box>
        <svg:title/>
        <svg:desc/>
      </draw:frame>
      <draw:frame draw:id="id88" presentation:style-name="a947" draw:name="Holder 4" svg:x="6.86667in" svg:y="1.725in" svg:width="5.8in" svg:height="4.95in" presentation:class="object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89" presentation:style-name="a950" draw:name="Holder 5" svg:x="4.53333in" svg:y="6.975in" svg:width="4.26667in" svg:height="0.375in" presentation:class="footer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90" presentation:style-name="a955" draw:name="Holder 6" svg:x="0.66667in" svg:y="6.975in" svg:width="3.06667in" svg:height="0.375in" presentation:class="date-time" presentation:placeholder="false">
        <draw:text-box>
          <text:p text:style-name="a954" text:class-names="" text:cond-style-name=""><text:span text:style-name="a951" text:class-names=""><text:date text:fixed="false" style:data-style-name="a952"/></text:span><text:span text:style-name="a953" text:class-names=""/></text:p>
        </draw:text-box>
        <svg:title/>
        <svg:desc/>
      </draw:frame>
      <draw:frame draw:id="id91" presentation:style-name="a959" draw:name="Holder 7" svg:x="12.94979in" svg:y="6.98961in" svg:width="0.24792in" svg:height="0.28333in" presentation:class="page-number" presentation:placeholder="false">
        <draw:text-box>
          <text:p text:style-name="a958" text:class-names="" text:cond-style-name=""><text:span text:style-name="a956" text:class-names=""><text:page-number style:num-format="1" text:fixed="false"/></text:span><text:span text:style-name="a957" text:class-names=""/></text:p>
        </draw:text-box>
        <svg:title/>
        <svg:desc/>
      </draw:frame>
      <presentation:notes style:page-layout-name="pageLayout2" draw:style-name="a992">
        <draw:frame draw:id="id5" presentation:style-name="a962" draw:name="Header Placeholder 1" svg:x="0in" svg:y="0in" svg:width="3.25in" svg:height="0.50174in" presentation:class="header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6" presentation:style-name="a967" draw:name="Date Placeholder 2" svg:x="4.24826in" svg:y="0in" svg:width="3.25in" svg:height="0.50174in" presentation:class="date-time" presentation:placeholder="false">
          <draw:text-box>
            <text:p text:style-name="a966" text:class-names="" text:cond-style-name=""><text:span text:style-name="a963" text:class-names=""><text:date text:fixed="false" style:data-style-name="a964"/></text:span><text:span text:style-name="a9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8" draw:name="Slide Image Placeholder 3">
          <svg:title/>
          <svg:desc/>
        </draw:page-thumbnail>
        <draw:frame draw:id="id8" presentation:style-name="a984" draw:name="Notes Placeholder 4" svg:x="0.75in" svg:y="4.8125in" svg:width="6in" svg:height="3.9375in" presentation:class="notes" presentation:placeholder="false">
          <draw:text-box>
            <text:p text:style-name="a970" text:class-names="" text:cond-style-name=""><text:span text:style-name="a969" text:class-names="">Click to edit Master text styles</text:span></text:p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Second level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p text:style-name="a975" text:class-names="" text:cond-style-name=""><text:span text:style-name="a9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list text:style-name="a979">
                      <text:list-item>
                        <text:list text:style-name="a979">
                          <text:list-item>
                            <text:p text:style-name="a978" text:class-names="" text:cond-style-name=""><text:span text:style-name="a9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list text:style-name="a983">
                      <text:list-item>
                        <text:list text:style-name="a983">
                          <text:list-item>
                            <text:list text:style-name="a983">
                              <text:list-item>
                                <text:p text:style-name="a982" text:class-names="" text:cond-style-name=""><text:span text:style-name="a980" text:class-names="">Fifth level</text:span><text:span text:style-name="a9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7" draw:name="Footer Placeholder 5" svg:x="0in" svg:y="9.49826in" svg:width="3.25in" svg:height="0.50174in" presentation:class="footer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10" presentation:style-name="a991" draw:name="Slide Number Placeholder 6" svg:x="4.24826in" svg:y="9.49826in" svg:width="3.25in" svg:height="0.50174in" presentation:class="page-number" presentation:placeholder="false">
          <draw:text-box>
            <text:p text:style-name="a990" text:class-names="" text:cond-style-name=""><text:span text:style-name="a988" text:class-names=""><text:page-number style:num-format="1" text:fixed="false"/></text:span><text:span text:style-name="a989" text:class-names=""/></text:p>
          </draw:text-box>
          <svg:title/>
          <svg:desc/>
        </draw:frame>
      </presentation:notes>
    </style:master-page>
    <style:master-page style:name="Master2-Layout4-obj-Title-Only" style:page-layout-name="pageLayout1" draw:style-name="a993">
      <draw:frame draw:id="id92" presentation:style-name="a996" draw:name="Holder 2" svg:x="0.36871in" svg:y="0.14907in" svg:width="12.59591in" svg:height="0.69444in" presentation:class="titl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93" presentation:style-name="a999" draw:name="Holder 3" svg:x="4.53333in" svg:y="6.975in" svg:width="4.26667in" svg:height="0.375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94" presentation:style-name="a1004" draw:name="Holder 4" svg:x="0.66667in" svg:y="6.975in" svg:width="3.06667in" svg:height="0.375in" presentation:class="date-time" presentation:placeholder="false">
        <draw:text-box>
          <text:p text:style-name="a1003" text:class-names="" text:cond-style-name=""><text:span text:style-name="a1000" text:class-names=""><text:date text:fixed="false" style:data-style-name="a1001"/></text:span><text:span text:style-name="a1002" text:class-names=""/></text:p>
        </draw:text-box>
        <svg:title/>
        <svg:desc/>
      </draw:frame>
      <draw:frame draw:id="id95" presentation:style-name="a1008" draw:name="Holder 5" svg:x="12.94979in" svg:y="6.98961in" svg:width="0.24792in" svg:height="0.28333in" presentation:class="page-number" presentation:placeholder="false">
        <draw:text-box>
          <text:p text:style-name="a1007" text:class-names="" text:cond-style-name=""><text:span text:style-name="a1005" text:class-names=""><text:page-number style:num-format="1" text:fixed="false"/></text:span><text:span text:style-name="a1006" text:class-names=""/></text:p>
        </draw:text-box>
        <svg:title/>
        <svg:desc/>
      </draw:frame>
      <presentation:notes style:page-layout-name="pageLayout2" draw:style-name="a1041">
        <draw:frame draw:id="id5" presentation:style-name="a1011" draw:name="Header Placeholder 1" svg:x="0in" svg:y="0in" svg:width="3.25in" svg:height="0.50174in" presentation:class="head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6" presentation:style-name="a1016" draw:name="Date Placeholder 2" svg:x="4.24826in" svg:y="0in" svg:width="3.25in" svg:height="0.50174in" presentation:class="date-time" presentation:placeholder="false">
          <draw:text-box>
            <text:p text:style-name="a1015" text:class-names="" text:cond-style-name=""><text:span text:style-name="a1012" text:class-names=""><text:date text:fixed="false" style:data-style-name="a1013"/></text:span><text:span text:style-name="a10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17" draw:name="Slide Image Placeholder 3">
          <svg:title/>
          <svg:desc/>
        </draw:page-thumbnail>
        <draw:frame draw:id="id8" presentation:style-name="a1033" draw:name="Notes Placeholder 4" svg:x="0.75in" svg:y="4.8125in" svg:width="6in" svg:height="3.9375in" presentation:class="notes" presentation:placeholder="false">
          <draw:text-box>
            <text:p text:style-name="a1019" text:class-names="" text:cond-style-name=""><text:span text:style-name="a1018" text:class-names="">Click to edit Master text styles</text:span></text:p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20" text:class-names="">Second level</text:span></text:p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list text:style-name="a1025">
                      <text:list-item>
                        <text:p text:style-name="a1024" text:class-names="" text:cond-style-name=""><text:span text:style-name="a10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list text:style-name="a1028">
                      <text:list-item>
                        <text:list text:style-name="a1028">
                          <text:list-item>
                            <text:p text:style-name="a1027" text:class-names="" text:cond-style-name=""><text:span text:style-name="a10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list text:style-name="a1032">
                          <text:list-item>
                            <text:list text:style-name="a1032">
                              <text:list-item>
                                <text:p text:style-name="a1031" text:class-names="" text:cond-style-name=""><text:span text:style-name="a1029" text:class-names="">Fifth level</text:span><text:span text:style-name="a10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6" draw:name="Footer Placeholder 5" svg:x="0in" svg:y="9.49826in" svg:width="3.25in" svg:height="0.50174in" presentation:class="footer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10" presentation:style-name="a1040" draw:name="Slide Number Placeholder 6" svg:x="4.24826in" svg:y="9.49826in" svg:width="3.25in" svg:height="0.50174in" presentation:class="page-number" presentation:placeholder="false">
          <draw:text-box>
            <text:p text:style-name="a1039" text:class-names="" text:cond-style-name=""><text:span text:style-name="a1037" text:class-names=""><text:page-number style:num-format="1" text:fixed="false"/></text:span><text:span text:style-name="a1038" text:class-names=""/></text:p>
          </draw:text-box>
          <svg:title/>
          <svg:desc/>
        </draw:frame>
      </presentation:notes>
    </style:master-page>
    <style:master-page style:name="Master2-Layout5-obj-Blank" style:page-layout-name="pageLayout1" draw:style-name="a1042">
      <draw:frame draw:id="id96" draw:layer="Master2-bg" presentation:style-name="a1045" draw:name="Holder 2" svg:x="4.53333in" svg:y="6.975in" svg:width="4.26667in" svg:height="0.375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97" draw:layer="Master2-bg" presentation:style-name="a1050" draw:name="Holder 3" svg:x="0.66667in" svg:y="6.975in" svg:width="3.06667in" svg:height="0.375in" presentation:class="date-time" presentation:placeholder="false">
        <draw:text-box>
          <text:p text:style-name="a1049" text:class-names="" text:cond-style-name=""><text:span text:style-name="a1046" text:class-names=""><text:date text:fixed="false" style:data-style-name="a1047"/></text:span><text:span text:style-name="a1048" text:class-names=""/></text:p>
        </draw:text-box>
        <svg:title/>
        <svg:desc/>
      </draw:frame>
      <draw:frame draw:id="id98" presentation:style-name="a1054" draw:name="Holder 4" svg:x="12.94979in" svg:y="6.98961in" svg:width="0.24792in" svg:height="0.28333in" presentation:class="page-number" presentation:placeholder="false">
        <draw:text-box>
          <text:p text:style-name="a1053" text:class-names="" text:cond-style-name=""><text:span text:style-name="a1051" text:class-names=""><text:page-number style:num-format="1" text:fixed="false"/></text:span><text:span text:style-name="a1052" text:class-names=""/></text:p>
        </draw:text-box>
        <svg:title/>
        <svg:desc/>
      </draw:frame>
      <presentation:notes style:page-layout-name="pageLayout2" draw:style-name="a1087">
        <draw:frame draw:id="id5" presentation:style-name="a1057" draw:name="Header Placeholder 1" svg:x="0in" svg:y="0in" svg:width="3.25in" svg:height="0.50174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6" presentation:style-name="a1062" draw:name="Date Placeholder 2" svg:x="4.24826in" svg:y="0in" svg:width="3.25in" svg:height="0.50174in" presentation:class="date-time" presentation:placeholder="false">
          <draw:text-box>
            <text:p text:style-name="a1061" text:class-names="" text:cond-style-name=""><text:span text:style-name="a1058" text:class-names=""><text:date text:fixed="false" style:data-style-name="a1059"/></text:span><text:span text:style-name="a10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63" draw:name="Slide Image Placeholder 3">
          <svg:title/>
          <svg:desc/>
        </draw:page-thumbnail>
        <draw:frame draw:id="id8" presentation:style-name="a1079" draw:name="Notes Placeholder 4" svg:x="0.75in" svg:y="4.8125in" svg:width="6in" svg:height="3.9375in" presentation:class="notes" presentation:placeholder="false">
          <draw:text-box>
            <text:p text:style-name="a1065" text:class-names="" text:cond-style-name=""><text:span text:style-name="a1064" text:class-names="">Click to edit Master text styles</text:span></text:p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>Second level</text:span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list text:style-name="a1071">
                      <text:list-item>
                        <text:p text:style-name="a1070" text:class-names="" text:cond-style-name=""><text:span text:style-name="a10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list text:style-name="a1074">
                          <text:list-item>
                            <text:p text:style-name="a1073" text:class-names="" text:cond-style-name=""><text:span text:style-name="a10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list text:style-name="a1078">
                      <text:list-item>
                        <text:list text:style-name="a1078">
                          <text:list-item>
                            <text:list text:style-name="a1078">
                              <text:list-item>
                                <text:p text:style-name="a1077" text:class-names="" text:cond-style-name=""><text:span text:style-name="a1075" text:class-names="">Fifth level</text:span><text:span text:style-name="a10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2" draw:name="Footer Placeholder 5" svg:x="0in" svg:y="9.49826in" svg:width="3.25in" svg:height="0.50174in" presentation:class="footer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10" presentation:style-name="a1086" draw:name="Slide Number Placeholder 6" svg:x="4.24826in" svg:y="9.49826in" svg:width="3.25in" svg:height="0.50174in" presentation:class="page-number" presentation:placeholder="false">
          <draw:text-box>
            <text:p text:style-name="a1085" text:class-names="" text:cond-style-name=""><text:span text:style-name="a1083" text:class-names=""><text:page-number style:num-format="1" text:fixed="false"/></text:span><text:span text:style-name="a1084" text:class-names=""/></text:p>
          </draw:text-box>
          <svg:title/>
          <svg:desc/>
        </draw:frame>
      </presentation:notes>
    </style:master-page>
    <style:handout-master style:page-layout-name="pageLayout3" draw:style-name="a1088">
      <draw:frame draw:id="id99" presentation:style-name="a1091" draw:name="Header Placeholder 1" svg:x="0in" svg:y="0in" svg:width="3.25in" svg:height="0.50174in" presentation:class="header" presentation:placeholder="false">
        <draw:text-box>
          <text:p text:style-name="a1090" text:class-names="" text:cond-style-name=""><text:span text:style-name="a1089" text:class-names=""/></text:p>
        </draw:text-box>
        <svg:title/>
        <svg:desc/>
      </draw:frame>
      <draw:frame draw:id="id100" presentation:style-name="a1096" draw:name="Date Placeholder 2" svg:x="4.24826in" svg:y="0in" svg:width="3.25in" svg:height="0.50174in" presentation:class="date-time" presentation:placeholder="false">
        <draw:text-box>
          <text:p text:style-name="a1095" text:class-names="" text:cond-style-name=""><text:span text:style-name="a1092" text:class-names=""><text:date text:fixed="false" style:data-style-name="a1093"/></text:span><text:span text:style-name="a1094" text:class-names=""/></text:p>
        </draw:text-box>
        <svg:title/>
        <svg:desc/>
      </draw:frame>
      <draw:frame draw:id="id101" presentation:style-name="a1099" draw:name="Footer Placeholder 3" svg:x="0in" svg:y="9.49826in" svg:width="3.25in" svg:height="0.50174in" presentation:class="footer" presentation:placeholder="false">
        <draw:text-box>
          <text:p text:style-name="a1098" text:class-names="" text:cond-style-name=""><text:span text:style-name="a1097" text:class-names=""/></text:p>
        </draw:text-box>
        <svg:title/>
        <svg:desc/>
      </draw:frame>
      <draw:frame draw:id="id102" presentation:style-name="a1103" draw:name="Slide Number Placeholder 4" svg:x="4.24826in" svg:y="9.49826in" svg:width="3.25in" svg:height="0.50174in" presentation:class="page-number" presentation:placeholder="false">
        <draw:text-box>
          <text:p text:style-name="a1102" text:class-names="" text:cond-style-name=""><text:span text:style-name="a1100" text:class-names=""><text:page-number style:num-format="1" text:fixed="false"/></text:span><text:span text:style-name="a1101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LO BRUTTO LUCA</meta:initial-creator>
    <meta:creation-date>2026-05-06T09:47:29Z</meta:creation-date>
    <dc:date>2026-05-08T22:52:23Z</dc:date>
    <meta:editing-cycles>338</meta:editing-cycles>
    <meta:user-defined meta:name="ContentTypeId">0x010100EB489AFF19247942B42384C83497B72D</meta:user-defined>
  </office:meta>
</office:document-meta>
</file>

<file path=Object 1/content.xml><?xml version="1.0" encoding="utf-8"?>
<math xmlns="http://www.w3.org/1998/Math/MathML" display="block">
  <msub>
    <mi>W</mi>
    <mi>x</mi>
  </msub>
</math>
</file>

<file path=Object 2/content.xml><?xml version="1.0" encoding="utf-8"?>
<math xmlns="http://www.w3.org/1998/Math/MathML" display="block">
  <msub>
    <mi>W</mi>
    <mi mathvariant="normal">y</mi>
  </msub>
</math>
</file>